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Excel_32_Built-in_32_Comma" style:data-style-name="N39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Excel_32_Built-in_32_Comma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Excel_32_Built-in_32_Comma" style:data-style-name="N39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Excel_32_Built-in_32_Comma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30" style:family="table-cell" style:parent-style-name="Excel_32_Built-in_32_Comma" style:data-style-name="N39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39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42" style:family="table-cell" style:parent-style-name="Default" style:data-style-name="N39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39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48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4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="thin solid #000000" fo:background-color="transparent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0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61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2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3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4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5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6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7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8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9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0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1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2" style:family="table-cell" style:parent-style-name="Excel_32_Built-in_32_Normal_32_1" style:data-style-name="N37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3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76" style:family="table-cell" style:parent-style-name="Comma" style:data-style-name="N36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Excel_32_Built-in_32_Comma" style:data-style-name="N38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8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9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1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Excel_32_Built-in_32_Normal_32_1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4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5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6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7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8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9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Default" style:data-style-name="N2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4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6" style:family="table-cell" style:parent-style-name="Comma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9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37">
      <style:table-cell-properties fo:border="thin solid #000000"/>
      <style:text-properties fo:font-weight="bold" style:font-weight-asian="bold" style:font-weight-complex="bold"/>
    </style:style>
    <style:style style:name="ce103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04" style:family="table-cell" style:parent-style-name="Default" style:data-style-name="N37">
      <style:table-cell-properties fo:border="thin solid #000000"/>
    </style:style>
    <style:style style:name="ce105" style:family="table-cell" style:parent-style-name="Default" style:data-style-name="N0">
      <style:table-cell-properties fo:border="thin solid #000000"/>
    </style:style>
    <style:style style:name="ce106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7" style:family="table-cell" style:parent-style-name="Comma" style:data-style-name="N36"/>
    <style:style style:name="ce108" style:family="table-cell" style:parent-style-name="Default" style:data-style-name="N0"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0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1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2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113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4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5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16" style:family="table-cell" style:parent-style-name="Excel_32_Built-in_32_Normal_32_1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7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21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22" style:family="table-cell" style:parent-style-name="Excel_32_Built-in_32_Normal_32_1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23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4" style:family="table-cell" style:parent-style-name="Excel_32_Built-in_32_Normal_32_1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5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7" style:family="table-cell" style:parent-style-name="Default" style:data-style-name="N2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8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2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5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36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9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Excel_32_Built-in_32_Normal_32_1" style:data-style-name="N0">
      <style:table-cell-properties fo:border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1" style:family="table-cell" style:parent-style-name="Excel_32_Built-in_32_Normal_32_1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2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3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2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53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4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55" style:family="table-cell" style:parent-style-name="Excel_32_Built-in_32_Normal_32_1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6" style:family="table-cell" style:parent-style-name="Excel_32_Built-in_32_Normal_32_1" style:data-style-name="N3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1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9pt" style:font-size-asian="9pt" style:font-size-complex="9pt"/>
    </style:style>
    <style:style style:name="ce163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4" style:family="table-cell" style:parent-style-name="Excel_32_Built-in_32_Normal_32_1" style:data-style-name="N0">
      <style:table-cell-properties style:vertical-align="middle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165" style:family="table-cell" style:parent-style-name="Excel_32_Built-in_32_Normal_32_1" style:data-style-name="N0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6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67" style:family="table-cell" style:parent-style-name="Excel_32_Built-in_32_Normal_32_1" style:data-style-name="N3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8" style:family="table-cell" style:parent-style-name="Excel_32_Built-in_32_Normal_32_1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0" style:family="table-cell" style:parent-style-name="Excel_32_Built-in_32_Normal_32_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Excel_32_Built-in_32_Normal_32_1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72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3" style:family="table-cell" style:parent-style-name="Excel_32_Built-in_32_Normal_32_1" style:data-style-name="N3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176" style:family="table-cell" style:parent-style-name="Excel_32_Built-in_32_Normal_32_1" style:data-style-name="N13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77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8" style:family="table-cell" style:parent-style-name="Excel_32_Built-in_32_Normal_32_1" style:data-style-name="N13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7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0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81" style:family="table-cell" style:parent-style-name="Excel_32_Built-in_32_Normal_32_1" style:data-style-name="N4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2" style:family="table-cell" style:parent-style-name="Default" style:data-style-name="N2"/>
    <style:style style:name="ce183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7.884583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5.76791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0.07937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7.03791666666667cm"/>
    </style:style>
    <style:style style:name="co20" style:family="table-column">
      <style:table-column-properties fo:break-before="auto" style:column-width="5.26520833333333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5.52979166666667cm"/>
    </style:style>
    <style:style style:name="co24" style:family="table-column">
      <style:table-column-properties fo:break-before="auto" style:column-width="3.51895833333333cm"/>
    </style:style>
    <style:style style:name="co25" style:family="table-column">
      <style:table-column-properties fo:break-before="auto" style:column-width="3.413125cm"/>
    </style:style>
    <style:style style:name="co26" style:family="table-column">
      <style:table-column-properties fo:break-before="auto" style:column-width="7.35541666666667cm"/>
    </style:style>
    <style:style style:name="co27" style:family="table-column">
      <style:table-column-properties fo:break-before="auto" style:column-width="2.09020833333333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2.16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50.25pt" style:use-optimal-row-height="false" fo:break-before="auto"/>
    </style:style>
    <style:style style:name="ro9" style:family="table-row">
      <style:table-row-properties style:row-height="47.25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80.25pt" style:use-optimal-row-height="false" fo:break-before="auto"/>
    </style:style>
    <style:style style:name="ro1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3RD_QUARTER_MONTHLY_EXPENDI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" table:default-cell-style-name="ce1" table:visibility="collapse"/>
        <table:table-column table:style-name="co12" table:default-cell-style-name="ce1" table:visibility="collapse"/>
        <table:table-column table:style-name="co11" table:number-columns-repeated="8" table:default-cell-style-name="ce1" table:visibility="collapse"/>
        <table:table-column table:style-name="co13" table:default-cell-style-name="ce1"/>
        <table:table-column table:style-name="co11" table:number-columns-repeated="992" table:default-cell-style-name="ce1"/>
        <table:table-column table:style-name="co14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7" table:number-rows-spanned="1" table:style-name="ce52">
            <text:p>NATIONAL MUSEUMS OF KENYA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number-columns-spanned="7" table:number-rows-spanned="1" table:style-name="ce52">
            <text:p>PROCUREMENT REPORTING TOOL FOR QUARTERLY <text:s/>REPORTS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3">
            <text:p>STATION…INSTITUTE OF PRIMATE RESEARCH…….. QUARTER3RD…JAN-MARCH………………..……….. FINANCIAL YEAR……2021/2022……………</text:p>
          </table:table-cell>
          <table:table-cell table:style-name="ce4"/>
          <table:table-cell table:style-name="ce3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number-columns-spanned="5" table:number-rows-spanned="1" table:style-name="ce53">
            <text:p>1.Advertisement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8"/>
          <table:table-cell table:style-name="ce11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.Cartridges and Ton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print catridges HP CF</text:p>
          </table:table-cell>
          <table:table-cell office:value-type="float" office:value="133549" table:style-name="ce6">
            <text:p>133549</text:p>
          </table:table-cell>
          <table:table-cell office:value-type="string" table:style-name="ce12">
            <text:p>kenya toner ink supplies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florence Nzis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61340" table:style-name="ce6">
            <text:p>61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Hp toner 19A,CF219A,05A</text:p>
          </table:table-cell>
          <table:table-cell office:value-type="float" office:value="133667" table:style-name="ce6">
            <text:p>133667</text:p>
          </table:table-cell>
          <table:table-cell office:value-type="string" table:style-name="ce12">
            <text:p>Zippytech Agency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Hellen Maina</text:p>
          </table:table-cell>
          <table:table-cell office:value-type="float" office:value="720964768" table:style-name="ce6">
            <text:p>720964768</text:p>
          </table:table-cell>
          <table:table-cell office:value-type="float" office:value="17850" table:style-name="ce6">
            <text:p>178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HP Toners 17A,13A</text:p>
          </table:table-cell>
          <table:table-cell office:value-type="float" office:value="133668" table:style-name="ce6">
            <text:p>133668</text:p>
          </table:table-cell>
          <table:table-cell office:value-type="string" table:style-name="ce12">
            <text:p>Pamtop Suppli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Mary Pamela</text:p>
          </table:table-cell>
          <table:table-cell office:value-type="float" office:value="701455524" table:style-name="ce6">
            <text:p>701455524</text:p>
          </table:table-cell>
          <table:table-cell office:value-type="float" office:value="37060" table:style-name="ce6">
            <text:p>370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Hp toner 17A</text:p>
          </table:table-cell>
          <table:table-cell office:value-type="float" office:value="133697" table:style-name="ce6">
            <text:p>133697</text:p>
          </table:table-cell>
          <table:table-cell office:value-type="string" table:style-name="ce12">
            <text:p>Kaswii Investments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Joyce muthinzi</text:p>
          </table:table-cell>
          <table:table-cell office:value-type="float" office:value="726226995" table:style-name="ce6">
            <text:p>726226995</text:p>
          </table:table-cell>
          <table:table-cell office:value-type="float" office:value="24960" table:style-name="ce6">
            <text:p>249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string" table:style-name="ce14">
            <text:p>Catridge mfpm28 203</text:p>
          </table:table-cell>
          <table:table-cell office:value-type="float" office:value="133698" table:style-name="ce13">
            <text:p>133698</text:p>
          </table:table-cell>
          <table:table-cell office:value-type="string" table:style-name="ce12">
            <text:p>Cechum Enterpris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Cecillia wairimu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54150" table:style-name="ce6">
            <text:p>5415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13"/>
          <table:table-cell table:style-name="ce14"/>
          <table:table-cell table:style-name="ce13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.COMPUTER ACESSOR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provision of sanitary services jan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provision of internet services jan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Supply of fruits and vegetables for feb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96400" table:style-name="ce6">
            <text:p>9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provision of sanitary services feb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provision of internet services feb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Supply of fruits and vegetables for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121250" table:style-name="ce6">
            <text:p>1212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provision of sanitary services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provision of internet services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maintainance of cold room(quarter)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21600" table:style-name="ce6">
            <text:p>21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7">
            <text:p>maintainance of air conditioner(quarter)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amu retri-Electrical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issac kiraba</text:p>
          </table:table-cell>
          <table:table-cell office:value-type="float" office:value="722793553" table:style-name="ce6">
            <text:p>722793553</text:p>
          </table:table-cell>
          <table:table-cell office:value-type="float" office:value="137400" table:style-name="ce6">
            <text:p>137400</text:p>
          </table:table-cell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6. ADMISSION TICKET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style-name="ce1"/>
          <table:table-cell table:style-name="ce15"/>
          <table:table-cell table:number-columns-repeated="16373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3" table:style-name="ce1"/>
          <table:table-cell table:style-name="ce16"/>
          <table:table-cell table:number-columns-repeated="16371"/>
        </table:table-row>
        <table:table-row table:style-name="ro3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4">
            <text:p>7. Electrical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electrical accessories</text:p>
          </table:table-cell>
          <table:table-cell office:value-type="float" office:value="133788" table:style-name="ce17">
            <text:p>133788</text:p>
          </table:table-cell>
          <table:table-cell office:value-type="string" table:style-name="ce7">
            <text:p>Pinnacore kenya ltd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S.W.Kiarie</text:p>
          </table:table-cell>
          <table:table-cell office:value-type="float" office:value="722429188" table:style-name="ce9">
            <text:p>722429188</text:p>
          </table:table-cell>
          <table:table-cell office:value-type="float" office:value="21025" table:style-name="ce9">
            <text:p>21025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4 way consumable contact unit</text:p>
          </table:table-cell>
          <table:table-cell office:value-type="float" office:value="133790" table:style-name="ce17">
            <text:p>133790</text:p>
          </table:table-cell>
          <table:table-cell office:value-type="string" table:style-name="ce7">
            <text:p>BigQ Trader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veronica kihuto</text:p>
          </table:table-cell>
          <table:table-cell office:value-type="float" office:value="724662016" table:style-name="ce9">
            <text:p>724662016</text:p>
          </table:table-cell>
          <table:table-cell office:value-type="float" office:value="6790" table:style-name="ce9">
            <text:p>679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Tronic flood lights 100A</text:p>
          </table:table-cell>
          <table:table-cell office:value-type="float" office:value="133792" table:style-name="ce17">
            <text:p>133792</text:p>
          </table:table-cell>
          <table:table-cell office:value-type="string" table:style-name="ce7">
            <text:p>Bluesteki Venture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chrispus Gathiaka</text:p>
          </table:table-cell>
          <table:table-cell office:value-type="float" office:value="727291721" table:style-name="ce9">
            <text:p>727291721</text:p>
          </table:table-cell>
          <table:table-cell office:value-type="float" office:value="8400" table:style-name="ce9">
            <text:p>840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7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4">
            <text:p>8.Furniture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Office furnitures</text:p>
          </table:table-cell>
          <table:table-cell office:value-type="float" office:value="133775" table:style-name="ce6">
            <text:p>133775</text:p>
          </table:table-cell>
          <table:table-cell office:value-type="string" table:style-name="ce12">
            <text:p>Mt.Kenya furniture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ames Karanja</text:p>
          </table:table-cell>
          <table:table-cell office:value-type="float" office:value="723295349" table:style-name="ce6">
            <text:p>723295349</text:p>
          </table:table-cell>
          <table:table-cell office:value-type="float" office:value="310000" table:style-name="ce6">
            <text:p>31000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metallic shelves and book cards</text:p>
          </table:table-cell>
          <table:table-cell office:value-type="float" office:value="133787" table:style-name="ce6">
            <text:p>133787</text:p>
          </table:table-cell>
          <table:table-cell office:value-type="string" table:style-name="ce12">
            <text:p>Fast choice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Anne Kiarie</text:p>
          </table:table-cell>
          <table:table-cell office:value-type="float" office:value="711174433" table:style-name="ce6">
            <text:p>711174433</text:p>
          </table:table-cell>
          <table:table-cell office:value-type="float" office:value="296742" table:style-name="ce6">
            <text:p>296742</text:p>
          </table:table-cell>
          <table:table-cell table:style-name="ce10"/>
          <table:table-cell table:number-columns-repeated="16375" table:style-name="ce1"/>
        </table:table-row>
        <table:table-row table:number-rows-repeated="3"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55">
            <text:p>9.Motor Vehicle Expens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72" table:style-name="ce19">
            <text:p>13357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74" table:style-name="ce19">
            <text:p>13357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50 litres diesel for GKB 146R</text:p>
          </table:table-cell>
          <table:table-cell office:value-type="float" office:value="133575" table:style-name="ce19">
            <text:p>13357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8" table:style-name="ce6">
            <text:p>72069564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576" table:style-name="ce19">
            <text:p>13357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9" table:style-name="ce6">
            <text:p>720695649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577" table:style-name="ce19">
            <text:p>13357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0" table:style-name="ce6">
            <text:p>720695650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78" table:style-name="ce19">
            <text:p>13357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1" table:style-name="ce6">
            <text:p>72069565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40 litres diesel for Generator</text:p>
          </table:table-cell>
          <table:table-cell office:value-type="float" office:value="133579" table:style-name="ce19">
            <text:p>13357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2" table:style-name="ce6">
            <text:p>720695652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580" table:style-name="ce19">
            <text:p>13358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3" table:style-name="ce6">
            <text:p>720695653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81" table:style-name="ce19">
            <text:p>13358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4" table:style-name="ce6">
            <text:p>720695654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582" table:style-name="ce19">
            <text:p>13358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5" table:style-name="ce6">
            <text:p>720695655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12">
            <text:p>50 litres petrol for KAL107U</text:p>
          </table:table-cell>
          <table:table-cell office:value-type="float" office:value="133583" table:style-name="ce19">
            <text:p>13358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6" table:style-name="ce6">
            <text:p>720695656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12">
            <text:p>60 Llitres petrol for KCT811Y</text:p>
          </table:table-cell>
          <table:table-cell office:value-type="float" office:value="133584" table:style-name="ce19">
            <text:p>13358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7" table:style-name="ce6">
            <text:p>72069565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85" table:style-name="ce19">
            <text:p>13358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8" table:style-name="ce6">
            <text:p>72069565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86" table:style-name="ce19">
            <text:p>13358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9" table:style-name="ce6">
            <text:p>720695659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87" table:style-name="ce19">
            <text:p>13358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0" table:style-name="ce6">
            <text:p>720695660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12">
            <text:p>40litres petrol for KBL 126G</text:p>
          </table:table-cell>
          <table:table-cell office:value-type="float" office:value="133588" table:style-name="ce19">
            <text:p>13358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1" table:style-name="ce6">
            <text:p>720695661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89" table:style-name="ce19">
            <text:p>13358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2" table:style-name="ce6">
            <text:p>720695662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12">
            <text:p>150 litres diesel for KBT 506N</text:p>
          </table:table-cell>
          <table:table-cell office:value-type="float" office:value="133590" table:style-name="ce19">
            <text:p>13359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3" table:style-name="ce6">
            <text:p>720695663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591" table:style-name="ce19">
            <text:p>13359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4" table:style-name="ce6">
            <text:p>720695664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21">
            <text:p>50 litres for GKB146R</text:p>
          </table:table-cell>
          <table:table-cell office:value-type="float" office:value="133592" table:style-name="ce7">
            <text:p>13359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5" table:style-name="ce6">
            <text:p>720695665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12">
            <text:p>40 litres petrol for KBC126G</text:p>
          </table:table-cell>
          <table:table-cell office:value-type="float" office:value="133593" table:style-name="ce19">
            <text:p>13359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6" table:style-name="ce6">
            <text:p>720695666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94" table:style-name="ce7">
            <text:p>13359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7" table:style-name="ce6">
            <text:p>720695667</text:p>
          </table:table-cell>
          <table:table-cell office:value-type="float" office:value="13277" table:style-name="ce6">
            <text:p>13277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95" table:style-name="ce19">
            <text:p>13359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8" table:style-name="ce6">
            <text:p>72069566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596" table:style-name="ce19">
            <text:p>13359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9" table:style-name="ce6">
            <text:p>720695669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97" table:style-name="ce19">
            <text:p>13359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0" table:style-name="ce6">
            <text:p>720695670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style-name="ce12">
            <text:p>50 litres diesel for GKB146R</text:p>
          </table:table-cell>
          <table:table-cell office:value-type="float" office:value="133598" table:style-name="ce19">
            <text:p>13359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1" table:style-name="ce6">
            <text:p>720695671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7" table:style-name="ce6">
            <text:p>27</text:p>
          </table:table-cell>
          <table:table-cell office:value-type="string" table:style-name="ce12">
            <text:p>55litres petrol for KCU502Z</text:p>
          </table:table-cell>
          <table:table-cell office:value-type="float" office:value="133599" table:style-name="ce19">
            <text:p>13359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2" table:style-name="ce6">
            <text:p>720695672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600" table:style-name="ce19">
            <text:p>13360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3" table:style-name="ce6">
            <text:p>720695673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01" table:style-name="ce19">
            <text:p>1336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4" table:style-name="ce6">
            <text:p>720695674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12">
            <text:p>20 litres petrol for lawn mower</text:p>
          </table:table-cell>
          <table:table-cell office:value-type="float" office:value="133602" table:style-name="ce19">
            <text:p>1336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5" table:style-name="ce6">
            <text:p>720695675</text:p>
          </table:table-cell>
          <table:table-cell office:value-type="float" office:value="2594" table:style-name="ce6">
            <text:p>259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12">
            <text:p>80litres diesel for KCH 490Q</text:p>
          </table:table-cell>
          <table:table-cell office:value-type="float" office:value="133603" table:style-name="ce7">
            <text:p>1336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6" table:style-name="ce6">
            <text:p>720695676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12">
            <text:p>40litres petrol for KBL 126G</text:p>
          </table:table-cell>
          <table:table-cell office:value-type="float" office:value="133604" table:style-name="ce7">
            <text:p>1336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7" table:style-name="ce6">
            <text:p>720695677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12">
            <text:p>40litres petrol for KAV274E</text:p>
          </table:table-cell>
          <table:table-cell office:value-type="float" office:value="133605" table:style-name="ce7">
            <text:p>1336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8" table:style-name="ce6">
            <text:p>720695678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606" table:style-name="ce7">
            <text:p>1336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9" table:style-name="ce6">
            <text:p>720695679</text:p>
          </table:table-cell>
          <table:table-cell office:value-type="float" office:value="16696" table:style-name="ce6">
            <text:p>16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607" table:style-name="ce7">
            <text:p>1336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0" table:style-name="ce6">
            <text:p>720695680</text:p>
          </table:table-cell>
          <table:table-cell office:value-type="float" office:value="8872" table:style-name="ce6">
            <text:p>88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608" table:style-name="ce7">
            <text:p>1336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1" table:style-name="ce6">
            <text:p>72069568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string" table:style-name="ce12">
            <text:p>55 litres petrol for KCU502Z</text:p>
          </table:table-cell>
          <table:table-cell office:value-type="float" office:value="133609" table:style-name="ce19">
            <text:p>1336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2" table:style-name="ce6">
            <text:p>720695682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10" table:style-name="ce19">
            <text:p>13361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3" table:style-name="ce6">
            <text:p>720695683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12">
            <text:p>50litres diesel for GKB335T</text:p>
          </table:table-cell>
          <table:table-cell office:value-type="float" office:value="133611" table:style-name="ce19">
            <text:p>1336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4" table:style-name="ce6">
            <text:p>720695684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string" table:style-name="ce12">
            <text:p>40litres petrol for KBL 126G</text:p>
          </table:table-cell>
          <table:table-cell office:value-type="float" office:value="133612" table:style-name="ce19">
            <text:p>1336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5" table:style-name="ce6">
            <text:p>720695685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12">
            <text:p>150 litres diesel for KBT 506N</text:p>
          </table:table-cell>
          <table:table-cell office:value-type="float" office:value="133613" table:style-name="ce19">
            <text:p>1336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6" table:style-name="ce6">
            <text:p>720695686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614" table:style-name="ce19">
            <text:p>1336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7" table:style-name="ce6">
            <text:p>720695687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12">
            <text:p>60litres petrol for KCT811Y</text:p>
          </table:table-cell>
          <table:table-cell office:value-type="float" office:value="133615" table:style-name="ce19">
            <text:p>1336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8" table:style-name="ce6">
            <text:p>720695688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12">
            <text:p>160litres diesel for KCP827K</text:p>
          </table:table-cell>
          <table:table-cell office:value-type="float" office:value="133616" table:style-name="ce19">
            <text:p>1336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9" table:style-name="ce6">
            <text:p>720695689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617" table:style-name="ce19">
            <text:p>1336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0" table:style-name="ce6">
            <text:p>720695690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18" table:style-name="ce19">
            <text:p>1336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1" table:style-name="ce6">
            <text:p>72069569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12">
            <text:p>60litres petrol for KCT811Y</text:p>
          </table:table-cell>
          <table:table-cell office:value-type="float" office:value="133619" table:style-name="ce19">
            <text:p>1336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2" table:style-name="ce6">
            <text:p>720695692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20" table:style-name="ce19">
            <text:p>1336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3" table:style-name="ce6">
            <text:p>720695693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12">
            <text:p>55litres petrol for KCU502Z</text:p>
          </table:table-cell>
          <table:table-cell office:value-type="float" office:value="133621" table:style-name="ce19">
            <text:p>1336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4" table:style-name="ce6">
            <text:p>720695694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12">
            <text:p>400litres diesel for generator</text:p>
          </table:table-cell>
          <table:table-cell office:value-type="float" office:value="133622" table:style-name="ce19">
            <text:p>1336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5" table:style-name="ce6">
            <text:p>720695695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12">
            <text:p>50litres petrol for KAL107U</text:p>
          </table:table-cell>
          <table:table-cell office:value-type="float" office:value="133623" table:style-name="ce19">
            <text:p>1336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6" table:style-name="ce6">
            <text:p>720695696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24" table:style-name="ce19">
            <text:p>1336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7" table:style-name="ce6">
            <text:p>72069569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3" table:style-name="ce6">
            <text:p>53</text:p>
          </table:table-cell>
          <table:table-cell office:value-type="string" table:style-name="ce12">
            <text:p>400litres diesel for incinerator</text:p>
          </table:table-cell>
          <table:table-cell office:value-type="float" office:value="133625" table:style-name="ce19">
            <text:p>1336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8" table:style-name="ce6">
            <text:p>720695698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626" table:style-name="ce19">
            <text:p>1336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9" table:style-name="ce6">
            <text:p>720695699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12">
            <text:p>60 litres diesel for KCT730Y</text:p>
          </table:table-cell>
          <table:table-cell office:value-type="float" office:value="133627" table:style-name="ce19">
            <text:p>1336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0" table:style-name="ce6">
            <text:p>720695700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6" table:style-name="ce6">
            <text:p>56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628" table:style-name="ce19">
            <text:p>1336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1" table:style-name="ce6">
            <text:p>720695701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7" table:style-name="ce6">
            <text:p>57</text:p>
          </table:table-cell>
          <table:table-cell office:value-type="string" table:style-name="ce12">
            <text:p>60 litres diesel <text:s/>for KCT730Y</text:p>
          </table:table-cell>
          <table:table-cell office:value-type="float" office:value="133629" table:style-name="ce19">
            <text:p>1336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2" table:style-name="ce6">
            <text:p>720695702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8" table:style-name="ce6">
            <text:p>58</text:p>
          </table:table-cell>
          <table:table-cell office:value-type="string" table:style-name="ce12">
            <text:p>40 litres petrol for KBC126G</text:p>
          </table:table-cell>
          <table:table-cell office:value-type="float" office:value="133630" table:style-name="ce19">
            <text:p>1336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3" table:style-name="ce6">
            <text:p>720695703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9" table:style-name="ce6">
            <text:p>59</text:p>
          </table:table-cell>
          <table:table-cell office:value-type="string" table:style-name="ce12">
            <text:p>50 litres diesel for GKB146R</text:p>
          </table:table-cell>
          <table:table-cell office:value-type="float" office:value="133631" table:style-name="ce19">
            <text:p>1336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4" table:style-name="ce6">
            <text:p>720695704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0" table:style-name="ce6">
            <text:p>60</text:p>
          </table:table-cell>
          <table:table-cell office:value-type="string" table:style-name="ce12">
            <text:p>50 litres petrol for KAL107U</text:p>
          </table:table-cell>
          <table:table-cell office:value-type="float" office:value="133632" table:style-name="ce19">
            <text:p>1336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5" table:style-name="ce6">
            <text:p>720695705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1" table:style-name="ce6">
            <text:p>6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633" table:style-name="ce19">
            <text:p>1336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6" table:style-name="ce6">
            <text:p>720695706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2" table:style-name="ce6">
            <text:p>62</text:p>
          </table:table-cell>
          <table:table-cell office:value-type="string" table:style-name="ce12">
            <text:p>60litres petrol for KCT811Y</text:p>
          </table:table-cell>
          <table:table-cell office:value-type="float" office:value="133634" table:style-name="ce19">
            <text:p>1336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7" table:style-name="ce6">
            <text:p>72069570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3" table:style-name="ce6">
            <text:p>63</text:p>
          </table:table-cell>
          <table:table-cell office:value-type="string" table:style-name="ce12">
            <text:p>150litres diesel for KBT506N</text:p>
          </table:table-cell>
          <table:table-cell office:value-type="float" office:value="133635" table:style-name="ce19">
            <text:p>1336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8" table:style-name="ce6">
            <text:p>720695708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4" table:style-name="ce6">
            <text:p>64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36" table:style-name="ce19">
            <text:p>1336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9" table:style-name="ce6">
            <text:p>720695709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637" table:style-name="ce19">
            <text:p>1336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0" table:style-name="ce6">
            <text:p>720695710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6" table:style-name="ce6">
            <text:p>66</text:p>
          </table:table-cell>
          <table:table-cell office:value-type="string" table:style-name="ce12">
            <text:p>160litres diesel for KCP827K</text:p>
          </table:table-cell>
          <table:table-cell office:value-type="float" office:value="133638" table:style-name="ce19">
            <text:p>1336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1" table:style-name="ce6">
            <text:p>720695711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7" table:style-name="ce6">
            <text:p>67</text:p>
          </table:table-cell>
          <table:table-cell office:value-type="string" table:style-name="ce12">
            <text:p>60litres diesel for KCT730Y</text:p>
          </table:table-cell>
          <table:table-cell office:value-type="float" office:value="133639" table:style-name="ce19">
            <text:p>1336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2" table:style-name="ce6">
            <text:p>720695712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8" table:style-name="ce6">
            <text:p>68</text:p>
          </table:table-cell>
          <table:table-cell office:value-type="string" table:style-name="ce12">
            <text:p>40litres petrol for KAV274E</text:p>
          </table:table-cell>
          <table:table-cell office:value-type="float" office:value="133640" table:style-name="ce19">
            <text:p>1336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3" table:style-name="ce6">
            <text:p>720695713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9" table:style-name="ce6">
            <text:p>69</text:p>
          </table:table-cell>
          <table:table-cell office:value-type="string" table:style-name="ce7">
            <text:p>60 litres petrol for KCT 811Y</text:p>
          </table:table-cell>
          <table:table-cell office:value-type="float" office:value="133641" table:style-name="ce17">
            <text:p>1336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4" table:style-name="ce6">
            <text:p>720695714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0" table:style-name="ce6">
            <text:p>70</text:p>
          </table:table-cell>
          <table:table-cell office:value-type="string" table:style-name="ce7">
            <text:p>50 litres diesel for GKB146R</text:p>
          </table:table-cell>
          <table:table-cell office:value-type="float" office:value="133642" table:style-name="ce17">
            <text:p>1336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5" table:style-name="ce6">
            <text:p>720695715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1" table:style-name="ce6">
            <text:p>71</text:p>
          </table:table-cell>
          <table:table-cell office:value-type="string" table:style-name="ce7">
            <text:p>80litres diesel for KCZ551B</text:p>
          </table:table-cell>
          <table:table-cell office:value-type="float" office:value="133643" table:style-name="ce17">
            <text:p>1336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6" table:style-name="ce6">
            <text:p>720695716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2" table:style-name="ce6">
            <text:p>72</text:p>
          </table:table-cell>
          <table:table-cell office:value-type="string" table:style-name="ce7">
            <text:p>50litres diesel for GKB335T</text:p>
          </table:table-cell>
          <table:table-cell office:value-type="float" office:value="133644" table:style-name="ce17">
            <text:p>1336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7" table:style-name="ce6">
            <text:p>720695717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3" table:style-name="ce6">
            <text:p>73</text:p>
          </table:table-cell>
          <table:table-cell office:value-type="string" table:style-name="ce7">
            <text:p>40 litres petrol for KBC126G</text:p>
          </table:table-cell>
          <table:table-cell office:value-type="float" office:value="133645" table:style-name="ce23">
            <text:p>1336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8" table:style-name="ce6">
            <text:p>720695718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4" table:style-name="ce6">
            <text:p>74</text:p>
          </table:table-cell>
          <table:table-cell office:value-type="string" table:style-name="ce7">
            <text:p>50 litres petrol for KAL107U</text:p>
          </table:table-cell>
          <table:table-cell office:value-type="float" office:value="133646" table:style-name="ce23">
            <text:p>1336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9" table:style-name="ce6">
            <text:p>720695719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5" table:style-name="ce6">
            <text:p>75</text:p>
          </table:table-cell>
          <table:table-cell office:value-type="string" table:style-name="ce7">
            <text:p>60litres petrol for KCT811Y</text:p>
          </table:table-cell>
          <table:table-cell office:value-type="float" office:value="133647" table:style-name="ce23">
            <text:p>1336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0" table:style-name="ce6">
            <text:p>720695720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6" table:style-name="ce6">
            <text:p>76</text:p>
          </table:table-cell>
          <table:table-cell office:value-type="string" table:style-name="ce7">
            <text:p>160litres diesel for KCP827K</text:p>
          </table:table-cell>
          <table:table-cell office:value-type="float" office:value="133648" table:style-name="ce23">
            <text:p>1336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1" table:style-name="ce6">
            <text:p>720695721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string" table:style-name="ce7">
            <text:p>40litres petrol for KAV274E</text:p>
          </table:table-cell>
          <table:table-cell office:value-type="float" office:value="133649" table:style-name="ce23">
            <text:p>1336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2" table:style-name="ce6">
            <text:p>720695722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8" table:style-name="ce6">
            <text:p>78</text:p>
          </table:table-cell>
          <table:table-cell office:value-type="string" table:style-name="ce7">
            <text:p>400litres diesel for generator</text:p>
          </table:table-cell>
          <table:table-cell office:value-type="float" office:value="133650" table:style-name="ce23">
            <text:p>1336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3" table:style-name="ce6">
            <text:p>720695723</text:p>
          </table:table-cell>
          <table:table-cell office:value-type="float" office:value="44240" table:style-name="ce22">
            <text:p>44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9" table:style-name="ce6">
            <text:p>79</text:p>
          </table:table-cell>
          <table:table-cell office:value-type="string" table:style-name="ce7">
            <text:p>55litres petrol for KCU502Z</text:p>
          </table:table-cell>
          <table:table-cell office:value-type="float" office:value="133701" table:style-name="ce23">
            <text:p>1337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4" table:style-name="ce6">
            <text:p>720695724</text:p>
          </table:table-cell>
          <table:table-cell office:value-type="float" office:value="7134" table:style-name="ce22">
            <text:p>713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0" table:style-name="ce6">
            <text:p>80</text:p>
          </table:table-cell>
          <table:table-cell office:value-type="string" table:style-name="ce7">
            <text:p>120litres diesel for KCU576Z</text:p>
          </table:table-cell>
          <table:table-cell office:value-type="float" office:value="133702" table:style-name="ce23">
            <text:p>1337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5" table:style-name="ce6">
            <text:p>720695725</text:p>
          </table:table-cell>
          <table:table-cell office:value-type="float" office:value="13272" table:style-name="ce22">
            <text:p>132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1" table:style-name="ce6">
            <text:p>81</text:p>
          </table:table-cell>
          <table:table-cell office:value-type="string" table:style-name="ce7">
            <text:p>55litres petrol for KCU502Z</text:p>
          </table:table-cell>
          <table:table-cell office:value-type="float" office:value="133703" table:style-name="ce23">
            <text:p>1337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6" table:style-name="ce6">
            <text:p>720695726</text:p>
          </table:table-cell>
          <table:table-cell office:value-type="float" office:value="7134" table:style-name="ce22">
            <text:p>713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2" table:style-name="ce6">
            <text:p>82</text:p>
          </table:table-cell>
          <table:table-cell office:value-type="string" table:style-name="ce7">
            <text:p>50litres petrol for KAL107U</text:p>
          </table:table-cell>
          <table:table-cell office:value-type="float" office:value="133704" table:style-name="ce23">
            <text:p>1337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7" table:style-name="ce6">
            <text:p>720695727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3" table:style-name="ce6">
            <text:p>83</text:p>
          </table:table-cell>
          <table:table-cell office:value-type="string" table:style-name="ce7">
            <text:p>60 litres petrol for KCT 811Y</text:p>
          </table:table-cell>
          <table:table-cell office:value-type="float" office:value="133705" table:style-name="ce23">
            <text:p>1337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8" table:style-name="ce6">
            <text:p>720695728</text:p>
          </table:table-cell>
          <table:table-cell office:value-type="float" office:value="7184" table:style-name="ce22">
            <text:p>718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4" table:style-name="ce6">
            <text:p>84</text:p>
          </table:table-cell>
          <table:table-cell office:value-type="string" table:style-name="ce7">
            <text:p>150litres diesel for KBT506N</text:p>
          </table:table-cell>
          <table:table-cell office:value-type="float" office:value="133706" table:style-name="ce23">
            <text:p>1337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9" table:style-name="ce6">
            <text:p>720695729</text:p>
          </table:table-cell>
          <table:table-cell office:value-type="float" office:value="16590" table:style-name="ce22">
            <text:p>1659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string" table:style-name="ce7">
            <text:p>40litres petrol for KBL 126G</text:p>
          </table:table-cell>
          <table:table-cell office:value-type="float" office:value="133707" table:style-name="ce23">
            <text:p>1337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0" table:style-name="ce6">
            <text:p>720695730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6" table:style-name="ce6">
            <text:p>86</text:p>
          </table:table-cell>
          <table:table-cell office:value-type="string" table:style-name="ce7">
            <text:p>160litres diesel for KCP827K</text:p>
          </table:table-cell>
          <table:table-cell office:value-type="float" office:value="133708" table:style-name="ce23">
            <text:p>1337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1" table:style-name="ce6">
            <text:p>720695731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7" table:style-name="ce6">
            <text:p>87</text:p>
          </table:table-cell>
          <table:table-cell office:value-type="string" table:style-name="ce7">
            <text:p>40litres petrol for KAV274E</text:p>
          </table:table-cell>
          <table:table-cell office:value-type="float" office:value="133709" table:style-name="ce23">
            <text:p>1337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2" table:style-name="ce6">
            <text:p>720695732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string" table:style-name="ce7">
            <text:p>50litres diesel for GKB335T</text:p>
          </table:table-cell>
          <table:table-cell office:value-type="float" office:value="133711" table:style-name="ce23">
            <text:p>1337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3" table:style-name="ce6">
            <text:p>720695733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9" table:style-name="ce6">
            <text:p>89</text:p>
          </table:table-cell>
          <table:table-cell office:value-type="string" table:style-name="ce7">
            <text:p>50litres diesel for GKB146R</text:p>
          </table:table-cell>
          <table:table-cell office:value-type="float" office:value="133712" table:style-name="ce23">
            <text:p>1337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4" table:style-name="ce6">
            <text:p>720695734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0" table:style-name="ce6">
            <text:p>90</text:p>
          </table:table-cell>
          <table:table-cell office:value-type="string" table:style-name="ce7">
            <text:p>80litres diesel for KCZ551B</text:p>
          </table:table-cell>
          <table:table-cell office:value-type="float" office:value="133713" table:style-name="ce23">
            <text:p>1337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5" table:style-name="ce6">
            <text:p>720695735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1" table:style-name="ce6">
            <text:p>91</text:p>
          </table:table-cell>
          <table:table-cell office:value-type="string" table:style-name="ce7">
            <text:p>50litres disel for GKB146R</text:p>
          </table:table-cell>
          <table:table-cell office:value-type="float" office:value="133714" table:style-name="ce17">
            <text:p>1337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6" table:style-name="ce6">
            <text:p>720695736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2" table:style-name="ce6">
            <text:p>92</text:p>
          </table:table-cell>
          <table:table-cell office:value-type="string" table:style-name="ce7">
            <text:p>50 litres petrol for KAL107U</text:p>
          </table:table-cell>
          <table:table-cell office:value-type="float" office:value="133715" table:style-name="ce17">
            <text:p>1337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7" table:style-name="ce6">
            <text:p>720695737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3" table:style-name="ce6">
            <text:p>93</text:p>
          </table:table-cell>
          <table:table-cell office:value-type="string" table:style-name="ce7">
            <text:p>120litres diesel for KCU576Z</text:p>
          </table:table-cell>
          <table:table-cell office:value-type="float" office:value="133716" table:style-name="ce17">
            <text:p>1337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8" table:style-name="ce6">
            <text:p>720695738</text:p>
          </table:table-cell>
          <table:table-cell office:value-type="float" office:value="13272" table:style-name="ce22">
            <text:p>132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4" table:style-name="ce6">
            <text:p>94</text:p>
          </table:table-cell>
          <table:table-cell office:value-type="string" table:style-name="ce7">
            <text:p>60litres petrol for KCT730Y</text:p>
          </table:table-cell>
          <table:table-cell office:value-type="float" office:value="133717" table:style-name="ce17">
            <text:p>1337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9" table:style-name="ce6">
            <text:p>720695739</text:p>
          </table:table-cell>
          <table:table-cell office:value-type="float" office:value="6636" table:style-name="ce22">
            <text:p>66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5" table:style-name="ce6">
            <text:p>95</text:p>
          </table:table-cell>
          <table:table-cell office:value-type="string" table:style-name="ce7">
            <text:p>50litres diesel for GKB146R</text:p>
          </table:table-cell>
          <table:table-cell office:value-type="float" office:value="133718" table:style-name="ce17">
            <text:p>1337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0" table:style-name="ce6">
            <text:p>720695740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6" table:style-name="ce6">
            <text:p>96</text:p>
          </table:table-cell>
          <table:table-cell office:value-type="string" table:style-name="ce7">
            <text:p>40litres petrol for KBL 126G</text:p>
          </table:table-cell>
          <table:table-cell office:value-type="float" office:value="133719" table:style-name="ce17">
            <text:p>1337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1" table:style-name="ce6">
            <text:p>720695741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7" table:style-name="ce6">
            <text:p>97</text:p>
          </table:table-cell>
          <table:table-cell office:value-type="string" table:style-name="ce7">
            <text:p>50litres diesel for GKB335T</text:p>
          </table:table-cell>
          <table:table-cell office:value-type="float" office:value="133720" table:style-name="ce17">
            <text:p>1337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2" table:style-name="ce6">
            <text:p>720695742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string" table:style-name="ce7">
            <text:p>150litres diesel for KBT506N</text:p>
          </table:table-cell>
          <table:table-cell office:value-type="float" office:value="133721" table:style-name="ce17">
            <text:p>1337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3" table:style-name="ce6">
            <text:p>720695743</text:p>
          </table:table-cell>
          <table:table-cell office:value-type="float" office:value="16590" table:style-name="ce22">
            <text:p>1659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string" table:style-name="ce7">
            <text:p>40litres petrol for KAV274E</text:p>
          </table:table-cell>
          <table:table-cell office:value-type="float" office:value="133722" table:style-name="ce17">
            <text:p>1337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4" table:style-name="ce6">
            <text:p>720695744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string" table:style-name="ce7">
            <text:p>60litres petrol for KCT811Y</text:p>
          </table:table-cell>
          <table:table-cell office:value-type="float" office:value="133723" table:style-name="ce17">
            <text:p>1337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5" table:style-name="ce6">
            <text:p>720695745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1" table:style-name="ce6">
            <text:p>101</text:p>
          </table:table-cell>
          <table:table-cell office:value-type="string" table:style-name="ce7">
            <text:p>80litres diesel for KCZ551B</text:p>
          </table:table-cell>
          <table:table-cell office:value-type="float" office:value="133724" table:style-name="ce17">
            <text:p>1337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6" table:style-name="ce6">
            <text:p>720695746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2" table:style-name="ce6">
            <text:p>102</text:p>
          </table:table-cell>
          <table:table-cell office:value-type="string" table:style-name="ce7">
            <text:p>160litres diesel for KCP827K</text:p>
          </table:table-cell>
          <table:table-cell office:value-type="float" office:value="133725" table:style-name="ce23">
            <text:p>1337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7" table:style-name="ce6">
            <text:p>720695747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3" table:style-name="ce6">
            <text:p>103</text:p>
          </table:table-cell>
          <table:table-cell office:value-type="string" table:style-name="ce7">
            <text:p>60 litres diesel for KCT730Y</text:p>
          </table:table-cell>
          <table:table-cell office:value-type="float" office:value="133726" table:style-name="ce23">
            <text:p>1337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8" table:style-name="ce6">
            <text:p>720695748</text:p>
          </table:table-cell>
          <table:table-cell office:value-type="float" office:value="6636" table:style-name="ce22">
            <text:p>66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4" table:style-name="ce6">
            <text:p>104</text:p>
          </table:table-cell>
          <table:table-cell office:value-type="string" table:style-name="ce7">
            <text:p>160litres diesel for KCP827K</text:p>
          </table:table-cell>
          <table:table-cell office:value-type="float" office:value="133727" table:style-name="ce23">
            <text:p>1337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9" table:style-name="ce6">
            <text:p>720695749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5" table:style-name="ce6">
            <text:p>105</text:p>
          </table:table-cell>
          <table:table-cell office:value-type="string" table:style-name="ce7">
            <text:p>60litres petrol for KCT811Y</text:p>
          </table:table-cell>
          <table:table-cell office:value-type="float" office:value="133728" table:style-name="ce23">
            <text:p>1337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0" table:style-name="ce6">
            <text:p>720695750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6" table:style-name="ce6">
            <text:p>106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729" table:style-name="ce23">
            <text:p>1337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1" table:style-name="ce6">
            <text:p>720695751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7" table:style-name="ce6">
            <text:p>107</text:p>
          </table:table-cell>
          <table:table-cell office:value-type="string" table:style-name="ce7">
            <text:p>400litres diesel for Generator</text:p>
          </table:table-cell>
          <table:table-cell office:value-type="float" office:value="133730" table:style-name="ce23">
            <text:p>1337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2" table:style-name="ce6">
            <text:p>720695752</text:p>
          </table:table-cell>
          <table:table-cell office:value-type="float" office:value="46240" table:style-name="ce22">
            <text:p>46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8" table:style-name="ce6">
            <text:p>108</text:p>
          </table:table-cell>
          <table:table-cell office:value-type="string" table:style-name="ce7">
            <text:p>50 litres petrol for KAL107U</text:p>
          </table:table-cell>
          <table:table-cell office:value-type="float" office:value="133731" table:style-name="ce23">
            <text:p>1337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3" table:style-name="ce6">
            <text:p>720695753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9" table:style-name="ce6">
            <text:p>109</text:p>
          </table:table-cell>
          <table:table-cell office:value-type="string" table:style-name="ce7">
            <text:p>40 litres petrol for KAV 274E</text:p>
          </table:table-cell>
          <table:table-cell office:value-type="float" office:value="133732" table:style-name="ce23">
            <text:p>1337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4" table:style-name="ce6">
            <text:p>720695754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0" table:style-name="ce6">
            <text:p>110</text:p>
          </table:table-cell>
          <table:table-cell office:value-type="string" table:style-name="ce7">
            <text:p>50 litres diesel for GKB146R</text:p>
          </table:table-cell>
          <table:table-cell office:value-type="float" office:value="133733" table:style-name="ce23">
            <text:p>1337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5" table:style-name="ce6">
            <text:p>720695755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1" table:style-name="ce6">
            <text:p>111</text:p>
          </table:table-cell>
          <table:table-cell office:value-type="string" table:style-name="ce7">
            <text:p>40 litres petrol for KBC126G</text:p>
          </table:table-cell>
          <table:table-cell office:value-type="float" office:value="133734" table:style-name="ce23">
            <text:p>1337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6" table:style-name="ce6">
            <text:p>720695756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2" table:style-name="ce6">
            <text:p>112</text:p>
          </table:table-cell>
          <table:table-cell office:value-type="string" table:style-name="ce7">
            <text:p>50 litres diesel for GKB335T</text:p>
          </table:table-cell>
          <table:table-cell office:value-type="float" office:value="133735" table:style-name="ce23">
            <text:p>1337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7" table:style-name="ce6">
            <text:p>720695757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3" table:style-name="ce6">
            <text:p>113</text:p>
          </table:table-cell>
          <table:table-cell office:value-type="string" table:style-name="ce7">
            <text:p>60litres petrol for KCT811Y</text:p>
          </table:table-cell>
          <table:table-cell office:value-type="float" office:value="133736" table:style-name="ce23">
            <text:p>1337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8" table:style-name="ce6">
            <text:p>720695758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4" table:style-name="ce6">
            <text:p>114</text:p>
          </table:table-cell>
          <table:table-cell office:value-type="string" table:style-name="ce7">
            <text:p>60litres diesel for KCT730Y</text:p>
          </table:table-cell>
          <table:table-cell office:value-type="float" office:value="133737" table:style-name="ce23">
            <text:p>1337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9" table:style-name="ce6">
            <text:p>720695759</text:p>
          </table:table-cell>
          <table:table-cell office:value-type="float" office:value="6936" table:style-name="ce22">
            <text:p>69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5" table:style-name="ce6">
            <text:p>115</text:p>
          </table:table-cell>
          <table:table-cell office:value-type="string" table:style-name="ce7">
            <text:p>80litres diesel for KCZ551B</text:p>
          </table:table-cell>
          <table:table-cell office:value-type="float" office:value="133738" table:style-name="ce23">
            <text:p>1337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0" table:style-name="ce6">
            <text:p>720695760</text:p>
          </table:table-cell>
          <table:table-cell office:value-type="float" office:value="9248" table:style-name="ce22">
            <text:p>92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6" table:style-name="ce6">
            <text:p>116</text:p>
          </table:table-cell>
          <table:table-cell office:value-type="string" table:style-name="ce7">
            <text:p>60 litres petrol for KCT 811Y</text:p>
          </table:table-cell>
          <table:table-cell office:value-type="float" office:value="133739" table:style-name="ce23">
            <text:p>1337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1" table:style-name="ce6">
            <text:p>720695761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7" table:style-name="ce6">
            <text:p>117</text:p>
          </table:table-cell>
          <table:table-cell office:value-type="string" table:style-name="ce7">
            <text:p>50 litres diesel for GKB442Y</text:p>
          </table:table-cell>
          <table:table-cell office:value-type="float" office:value="133740" table:style-name="ce23">
            <text:p>1337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2" table:style-name="ce6">
            <text:p>720695762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8" table:style-name="ce6">
            <text:p>118</text:p>
          </table:table-cell>
          <table:table-cell office:value-type="string" table:style-name="ce7">
            <text:p>50 litres petrol for KAL107U</text:p>
          </table:table-cell>
          <table:table-cell office:value-type="float" office:value="133741" table:style-name="ce23">
            <text:p>1337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3" table:style-name="ce6">
            <text:p>720695763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9" table:style-name="ce6">
            <text:p>119</text:p>
          </table:table-cell>
          <table:table-cell office:value-type="string" table:style-name="ce7">
            <text:p>120litres diesel for KCU576Z</text:p>
          </table:table-cell>
          <table:table-cell office:value-type="float" office:value="133742" table:style-name="ce23">
            <text:p>1337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4" table:style-name="ce6">
            <text:p>720695764</text:p>
          </table:table-cell>
          <table:table-cell office:value-type="float" office:value="13872" table:style-name="ce22">
            <text:p>138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0" table:style-name="ce6">
            <text:p>120</text:p>
          </table:table-cell>
          <table:table-cell office:value-type="string" table:style-name="ce7">
            <text:p>40litres petrol for KBL 126G</text:p>
          </table:table-cell>
          <table:table-cell office:value-type="float" office:value="133743" table:style-name="ce23">
            <text:p>1337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5" table:style-name="ce6">
            <text:p>720695765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1" table:style-name="ce6">
            <text:p>121</text:p>
          </table:table-cell>
          <table:table-cell office:value-type="string" table:style-name="ce7">
            <text:p>120litres diesel for KCU576Z</text:p>
          </table:table-cell>
          <table:table-cell office:value-type="float" office:value="133744" table:style-name="ce23">
            <text:p>1337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6" table:style-name="ce6">
            <text:p>720695766</text:p>
          </table:table-cell>
          <table:table-cell office:value-type="float" office:value="13872" table:style-name="ce22">
            <text:p>138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2" table:style-name="ce6">
            <text:p>122</text:p>
          </table:table-cell>
          <table:table-cell office:value-type="string" table:style-name="ce7">
            <text:p>80litres diesel for KCZ551B</text:p>
          </table:table-cell>
          <table:table-cell office:value-type="float" office:value="133745" table:style-name="ce23">
            <text:p>1337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7" table:style-name="ce6">
            <text:p>720695767</text:p>
          </table:table-cell>
          <table:table-cell office:value-type="float" office:value="9248" table:style-name="ce22">
            <text:p>92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3" table:style-name="ce6">
            <text:p>123</text:p>
          </table:table-cell>
          <table:table-cell office:value-type="string" table:style-name="ce7">
            <text:p>150litres diesel for KBT506N</text:p>
          </table:table-cell>
          <table:table-cell office:value-type="float" office:value="133746" table:style-name="ce23">
            <text:p>1337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8" table:style-name="ce6">
            <text:p>720695768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4" table:style-name="ce6">
            <text:p>124</text:p>
          </table:table-cell>
          <table:table-cell office:value-type="string" table:style-name="ce7">
            <text:p>40litres petrol for KAV274E</text:p>
          </table:table-cell>
          <table:table-cell office:value-type="float" office:value="133747" table:style-name="ce23">
            <text:p>1337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9" table:style-name="ce6">
            <text:p>720695769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5" table:style-name="ce6">
            <text:p>125</text:p>
          </table:table-cell>
          <table:table-cell office:value-type="string" table:style-name="ce7">
            <text:p>80litres diesel for KCZ551B</text:p>
          </table:table-cell>
          <table:table-cell office:value-type="float" office:value="133748" table:style-name="ce23">
            <text:p>1337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0" table:style-name="ce6">
            <text:p>720695770</text:p>
          </table:table-cell>
          <table:table-cell office:value-type="float" office:value="9240" table:style-name="ce22">
            <text:p>9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6" table:style-name="ce6">
            <text:p>126</text:p>
          </table:table-cell>
          <table:table-cell office:value-type="string" table:style-name="ce7">
            <text:p>55 litres petrol for KCU502Z</text:p>
          </table:table-cell>
          <table:table-cell office:value-type="float" office:value="133749" table:style-name="ce23">
            <text:p>1337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1" table:style-name="ce6">
            <text:p>720695771</text:p>
          </table:table-cell>
          <table:table-cell office:value-type="float" office:value="7409" table:style-name="ce22">
            <text:p>7409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7" table:style-name="ce6">
            <text:p>127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750" table:style-name="ce23">
            <text:p>1337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2" table:style-name="ce6">
            <text:p>720695772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8" table:style-name="ce6">
            <text:p>128</text:p>
          </table:table-cell>
          <table:table-cell office:value-type="string" table:style-name="ce7">
            <text:p>60 litres petrol for KCT 811Y</text:p>
          </table:table-cell>
          <table:table-cell office:value-type="float" office:value="133801" table:style-name="ce23">
            <text:p>1338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3" table:style-name="ce6">
            <text:p>720695773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9" table:style-name="ce6">
            <text:p>129</text:p>
          </table:table-cell>
          <table:table-cell office:value-type="string" table:style-name="ce7">
            <text:p>50 litres petrol for KAL107U</text:p>
          </table:table-cell>
          <table:table-cell office:value-type="float" office:value="133802" table:style-name="ce23">
            <text:p>1338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4" table:style-name="ce6">
            <text:p>720695774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0" table:style-name="ce6">
            <text:p>130</text:p>
          </table:table-cell>
          <table:table-cell office:value-type="string" table:style-name="ce7">
            <text:p>150litres diesel for KBT506N</text:p>
          </table:table-cell>
          <table:table-cell office:value-type="float" office:value="133803" table:style-name="ce23">
            <text:p>1338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5" table:style-name="ce6">
            <text:p>720695775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1" table:style-name="ce6">
            <text:p>131</text:p>
          </table:table-cell>
          <table:table-cell office:value-type="string" table:style-name="ce7">
            <text:p>40 litres petrol for KAV 274E</text:p>
          </table:table-cell>
          <table:table-cell office:value-type="float" office:value="133804" table:style-name="ce23">
            <text:p>1338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6" table:style-name="ce6">
            <text:p>720695776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2" table:style-name="ce6">
            <text:p>132</text:p>
          </table:table-cell>
          <table:table-cell office:value-type="string" table:style-name="ce7">
            <text:p>40 litres petrol for KBC126G</text:p>
          </table:table-cell>
          <table:table-cell office:value-type="float" office:value="133805" table:style-name="ce23">
            <text:p>1338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7" table:style-name="ce6">
            <text:p>720695777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3" table:style-name="ce6">
            <text:p>133</text:p>
          </table:table-cell>
          <table:table-cell office:value-type="string" table:style-name="ce7">
            <text:p>160 litres diesel for KCP827K</text:p>
          </table:table-cell>
          <table:table-cell office:value-type="float" office:value="133806" table:style-name="ce23">
            <text:p>1338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8" table:style-name="ce6">
            <text:p>720695778</text:p>
          </table:table-cell>
          <table:table-cell office:value-type="float" office:value="18496" table:style-name="ce22">
            <text:p>184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4" table:style-name="ce6">
            <text:p>134</text:p>
          </table:table-cell>
          <table:table-cell office:value-type="string" table:style-name="ce7">
            <text:p>Motor Vehicle maintenance</text:p>
          </table:table-cell>
          <table:table-cell office:value-type="float" office:value="133676" table:style-name="ce23">
            <text:p>133676</text:p>
          </table:table-cell>
          <table:table-cell office:value-type="string" table:style-name="ce7">
            <text:p>Chamwa Motors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Duncan Mulwa</text:p>
          </table:table-cell>
          <table:table-cell office:value-type="float" office:value="721273818" table:style-name="ce22">
            <text:p>721273818</text:p>
          </table:table-cell>
          <table:table-cell office:value-type="float" office:value="187000" table:style-name="ce22">
            <text:p>187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5" table:style-name="ce6">
            <text:p>135</text:p>
          </table:table-cell>
          <table:table-cell office:value-type="string" table:style-name="ce7">
            <text:p>Tyress for kbl 126g</text:p>
          </table:table-cell>
          <table:table-cell office:value-type="float" office:value="133774" table:style-name="ce23">
            <text:p>133774</text:p>
          </table:table-cell>
          <table:table-cell office:value-type="string" table:style-name="ce7">
            <text:p>Mustral General trader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Allan Waweru</text:p>
          </table:table-cell>
          <table:table-cell office:value-type="float" office:value="727641892" table:style-name="ce22">
            <text:p>727641892</text:p>
          </table:table-cell>
          <table:table-cell office:value-type="float" office:value="64000" table:style-name="ce22">
            <text:p>64000</text:p>
          </table:table-cell>
          <table:table-cell table:style-name="ce10"/>
          <table:table-cell table:number-columns-repeated="16375"/>
        </table:table-row>
        <table:table-row table:number-rows-repeated="5" table:style-name="ro3">
          <table:table-cell table:style-name="ce6"/>
          <table:table-cell table:style-name="ce7"/>
          <table:table-cell table:style-name="ce24"/>
          <table:table-cell table:style-name="ce7"/>
          <table:table-cell table:number-columns-repeated="3" table:style-name="ce9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3" table:style-name="ce9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0.Janitor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Janitorials</text:p>
          </table:table-cell>
          <table:table-cell office:value-type="float" office:value="133547" table:style-name="ce19">
            <text:p>133547</text:p>
          </table:table-cell>
          <table:table-cell office:value-type="string" table:style-name="ce12">
            <text:p>Chandaria industri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Kioko</text:p>
          </table:table-cell>
          <table:table-cell office:value-type="float" office:value="722455372" table:style-name="ce6">
            <text:p>722455372</text:p>
          </table:table-cell>
          <table:table-cell office:value-type="float" office:value="110440" table:style-name="ce6">
            <text:p>1104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Janitorials</text:p>
          </table:table-cell>
          <table:table-cell office:value-type="float" office:value="133687" table:style-name="ce19">
            <text:p>133687</text:p>
          </table:table-cell>
          <table:table-cell office:value-type="string" table:style-name="ce12">
            <text:p>Smatgen International ltd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Veronica Mwikali</text:p>
          </table:table-cell>
          <table:table-cell office:value-type="float" office:value="718136628" table:style-name="ce6">
            <text:p>718136628</text:p>
          </table:table-cell>
          <table:table-cell office:value-type="float" office:value="60720" table:style-name="ce6">
            <text:p>60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Janitorials</text:p>
          </table:table-cell>
          <table:table-cell office:value-type="float" office:value="133688" table:style-name="ce19">
            <text:p>133688</text:p>
          </table:table-cell>
          <table:table-cell office:value-type="string" table:style-name="ce12">
            <text:p>Midanda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Johnson Irungu</text:p>
          </table:table-cell>
          <table:table-cell office:value-type="float" office:value="728040089" table:style-name="ce6">
            <text:p>728040089</text:p>
          </table:table-cell>
          <table:table-cell office:value-type="float" office:value="72460" table:style-name="ce6">
            <text:p>724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Janitorials</text:p>
          </table:table-cell>
          <table:table-cell office:value-type="float" office:value="133689" table:style-name="ce19">
            <text:p>133689</text:p>
          </table:table-cell>
          <table:table-cell office:value-type="string" table:style-name="ce12">
            <text:p>Smatgen International ltd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Veronica Mwikali</text:p>
          </table:table-cell>
          <table:table-cell office:value-type="float" office:value="718136628" table:style-name="ce6">
            <text:p>718136628</text:p>
          </table:table-cell>
          <table:table-cell office:value-type="float" office:value="215560" table:style-name="ce6">
            <text:p>2155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Janitorials</text:p>
          </table:table-cell>
          <table:table-cell office:value-type="float" office:value="133690" table:style-name="ce19">
            <text:p>133690</text:p>
          </table:table-cell>
          <table:table-cell office:value-type="string" table:style-name="ce12">
            <text:p>Midanda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Johnson Irungu</text:p>
          </table:table-cell>
          <table:table-cell office:value-type="float" office:value="728040089" table:style-name="ce6">
            <text:p>728040089</text:p>
          </table:table-cell>
          <table:table-cell office:value-type="float" office:value="146820" table:style-name="ce6">
            <text:p>1468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Janitorials</text:p>
          </table:table-cell>
          <table:table-cell office:value-type="float" office:value="133789" table:style-name="ce19">
            <text:p>133789</text:p>
          </table:table-cell>
          <table:table-cell office:value-type="string" table:style-name="ce12">
            <text:p>Chandaria industri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Kioko</text:p>
          </table:table-cell>
          <table:table-cell office:value-type="float" office:value="722455372" table:style-name="ce6">
            <text:p>722455372</text:p>
          </table:table-cell>
          <table:table-cell office:value-type="float" office:value="117810" table:style-name="ce6">
            <text:p>11781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12"/>
          <table:table-cell table:style-name="ce19"/>
          <table:table-cell table:number-columns-repeated="5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1.Laboratory chemicals and Equipmen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12">
            <text:p>Histopaque</text:p>
          </table:table-cell>
          <table:table-cell office:value-type="float" office:value="133550" table:style-name="ce19">
            <text:p>133550</text:p>
          </table:table-cell>
          <table:table-cell office:value-type="string" table:style-name="ce7">
            <text:p>skytech Africa Supplies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John Njue</text:p>
          </table:table-cell>
          <table:table-cell office:value-type="float" office:value="724837769" table:style-name="ce6">
            <text:p>724837769</text:p>
          </table:table-cell>
          <table:table-cell office:value-type="float" office:value="365000" table:style-name="ce6">
            <text:p>3650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2">
            <text:p>Lab Reagents</text:p>
          </table:table-cell>
          <table:table-cell office:value-type="float" office:value="133672" table:style-name="ce19">
            <text:p>133672</text:p>
          </table:table-cell>
          <table:table-cell office:value-type="string" table:style-name="ce7">
            <text:p>Life watchers supplies ltd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Jane Nyambura</text:p>
          </table:table-cell>
          <table:table-cell office:value-type="float" office:value="720666029" table:style-name="ce22">
            <text:p>720666029</text:p>
          </table:table-cell>
          <table:table-cell office:value-type="float" office:value="144600" table:style-name="ce6">
            <text:p>1446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2">
            <text:p>Ethanol GPR</text:p>
          </table:table-cell>
          <table:table-cell office:value-type="float" office:value="133677" table:style-name="ce19">
            <text:p>133677</text:p>
          </table:table-cell>
          <table:table-cell office:value-type="string" table:style-name="ce7">
            <text:p>Wilcare Enterprises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Irene Maingi</text:p>
          </table:table-cell>
          <table:table-cell office:value-type="float" office:value="716010725" table:style-name="ce22">
            <text:p>716010725</text:p>
          </table:table-cell>
          <table:table-cell office:value-type="float" office:value="57600" table:style-name="ce6">
            <text:p>576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2">
            <text:p>Agnose powder</text:p>
          </table:table-cell>
          <table:table-cell office:value-type="float" office:value="133754" table:style-name="ce19">
            <text:p>133754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5">
            <text:p>General</text:p>
          </table:table-cell>
          <table:table-cell office:value-type="string" table:style-name="ce25">
            <text:p>Kelvin Wachiuri</text:p>
          </table:table-cell>
          <table:table-cell office:value-type="float" office:value="725697037" table:style-name="ce25">
            <text:p>725697037</text:p>
          </table:table-cell>
          <table:table-cell office:value-type="float" office:value="11123" table:style-name="ce6">
            <text:p>11123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2">
            <text:p>Lab chemicals</text:p>
          </table:table-cell>
          <table:table-cell office:value-type="float" office:value="133768" table:style-name="ce19">
            <text:p>133768</text:p>
          </table:table-cell>
          <table:table-cell office:value-type="string" table:style-name="ce7">
            <text:p>kobian keny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Darash Patel</text:p>
          </table:table-cell>
          <table:table-cell office:value-type="float" office:value="723888006" table:style-name="ce22">
            <text:p>723888006</text:p>
          </table:table-cell>
          <table:table-cell office:value-type="float" office:value="27840" table:style-name="ce6">
            <text:p>2784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2">
            <text:p>chemical kit</text:p>
          </table:table-cell>
          <table:table-cell office:value-type="float" office:value="133772" table:style-name="ce19">
            <text:p>133772</text:p>
          </table:table-cell>
          <table:table-cell office:value-type="string" table:style-name="ce7">
            <text:p>Anatech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Jose Geda</text:p>
          </table:table-cell>
          <table:table-cell office:value-type="float" office:value="721475613" table:style-name="ce22">
            <text:p>721475613</text:p>
          </table:table-cell>
          <table:table-cell office:value-type="float" office:value="88066" table:style-name="ce6">
            <text:p>88066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2">
            <text:p>Bst warmstat DNA polymerase</text:p>
          </table:table-cell>
          <table:table-cell office:value-type="float" office:value="133773" table:style-name="ce19">
            <text:p>133773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5">
            <text:p>General</text:p>
          </table:table-cell>
          <table:table-cell office:value-type="string" table:style-name="ce25">
            <text:p>Kelvin Wachiuri</text:p>
          </table:table-cell>
          <table:table-cell office:value-type="float" office:value="725697037" table:style-name="ce25">
            <text:p>725697037</text:p>
          </table:table-cell>
          <table:table-cell office:value-type="float" office:value="29722" table:style-name="ce6">
            <text:p>29722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2">
            <text:p>Lunascripts supermix and safe view</text:p>
          </table:table-cell>
          <table:table-cell office:value-type="float" office:value="133776" table:style-name="ce19">
            <text:p>133776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 Wachiuri</text:p>
          </table:table-cell>
          <table:table-cell office:value-type="float" office:value="725697037" table:style-name="ce22">
            <text:p>725697037</text:p>
          </table:table-cell>
          <table:table-cell office:value-type="float" office:value="34739" table:style-name="ce6">
            <text:p>34739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2">
            <text:p>Safe Views</text:p>
          </table:table-cell>
          <table:table-cell office:value-type="float" office:value="133778" table:style-name="ce19">
            <text:p>133778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 Wachiuri</text:p>
          </table:table-cell>
          <table:table-cell office:value-type="float" office:value="725697037" table:style-name="ce22">
            <text:p>725697037</text:p>
          </table:table-cell>
          <table:table-cell office:value-type="float" office:value="8657" table:style-name="ce6">
            <text:p>8657</text:p>
          </table:table-cell>
          <table:table-cell table:style-name="ce10"/>
          <table:table-cell table:number-columns-repeated="16375"/>
        </table:table-row>
        <table:table-row table:number-rows-repeated="2" table:style-name="ro4">
          <table:table-cell table:style-name="ce6"/>
          <table:table-cell table:style-name="ce12"/>
          <table:table-cell table:style-name="ce19"/>
          <table:table-cell table:style-name="ce7"/>
          <table:table-cell table:style-name="ce22"/>
          <table:table-cell table:style-name="ce9"/>
          <table:table-cell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26"/>
          <table:table-cell table:style-name="ce7"/>
          <table:table-cell table:style-name="ce22"/>
          <table:table-cell table:style-name="ce9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2.Printing and duplicatio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printing directors business card</text:p>
          </table:table-cell>
          <table:table-cell office:value-type="float" office:value="133546" table:style-name="ce27">
            <text:p>133546</text:p>
          </table:table-cell>
          <table:table-cell office:value-type="string" table:style-name="ce7">
            <text:p>Harliflax printer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Muigai Njuguna</text:p>
          </table:table-cell>
          <table:table-cell office:value-type="float" office:value="722386846" table:style-name="ce9">
            <text:p>722386846</text:p>
          </table:table-cell>
          <table:table-cell office:value-type="float" office:value="250000" table:style-name="ce9">
            <text:p>250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A2 Size calendars</text:p>
          </table:table-cell>
          <table:table-cell office:value-type="float" office:value="133659" table:style-name="ce27">
            <text:p>133659</text:p>
          </table:table-cell>
          <table:table-cell office:value-type="string" table:style-name="ce7">
            <text:p>Hills Converters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Joseph theuri</text:p>
          </table:table-cell>
          <table:table-cell office:value-type="float" office:value="722830767" table:style-name="ce9">
            <text:p>722830767</text:p>
          </table:table-cell>
          <table:table-cell office:value-type="float" office:value="84440" table:style-name="ce9">
            <text:p>844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A3 Folded Nero 5 letters</text:p>
          </table:table-cell>
          <table:table-cell office:value-type="float" office:value="133661" table:style-name="ce27">
            <text:p>133661</text:p>
          </table:table-cell>
          <table:table-cell office:value-type="string" table:style-name="ce7">
            <text:p>Floging East Africa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Florence Nkirote</text:p>
          </table:table-cell>
          <table:table-cell office:value-type="float" office:value="722981720" table:style-name="ce9">
            <text:p>722981720</text:p>
          </table:table-cell>
          <table:table-cell office:value-type="float" office:value="41600" table:style-name="ce9">
            <text:p>4160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3. Station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Diaries</text:p>
          </table:table-cell>
          <table:table-cell office:value-type="float" office:value="133660" table:style-name="ce27">
            <text:p>133660</text:p>
          </table:table-cell>
          <table:table-cell office:value-type="string" table:style-name="ce7">
            <text:p>Harlifax printers &amp;General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Muigai Njuguna</text:p>
          </table:table-cell>
          <table:table-cell office:value-type="float" office:value="722386846" table:style-name="ce9">
            <text:p>722386846</text:p>
          </table:table-cell>
          <table:table-cell office:value-type="float" office:value="100500" table:style-name="ce9">
            <text:p>100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Branded biros and Envelopes</text:p>
          </table:table-cell>
          <table:table-cell office:value-type="float" office:value="133665" table:style-name="ce27">
            <text:p>133665</text:p>
          </table:table-cell>
          <table:table-cell office:value-type="string" table:style-name="ce7">
            <text:p>Pinnacore Kenya Ltd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S.W.Kiarie</text:p>
          </table:table-cell>
          <table:table-cell office:value-type="float" office:value="722429188" table:style-name="ce9">
            <text:p>722429188</text:p>
          </table:table-cell>
          <table:table-cell office:value-type="float" office:value="57000" table:style-name="ce9">
            <text:p>57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Stationeries</text:p>
          </table:table-cell>
          <table:table-cell office:value-type="float" office:value="133757" table:style-name="ce28">
            <text:p>133757</text:p>
          </table:table-cell>
          <table:table-cell office:value-type="string" table:style-name="ce7">
            <text:p>Beutsal International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Doughlas Sidialo</text:p>
          </table:table-cell>
          <table:table-cell office:value-type="float" office:value="720701626" table:style-name="ce29">
            <text:p>720701626</text:p>
          </table:table-cell>
          <table:table-cell office:value-type="float" office:value="102227" table:style-name="ce9">
            <text:p>10222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Stationeries</text:p>
          </table:table-cell>
          <table:table-cell office:value-type="float" office:value="133758" table:style-name="ce28">
            <text:p>133758</text:p>
          </table:table-cell>
          <table:table-cell office:value-type="string" table:style-name="ce7">
            <text:p>Maxi print &amp;colour ltd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Boniface Ondenyo</text:p>
          </table:table-cell>
          <table:table-cell office:value-type="float" office:value="721701344" table:style-name="ce29">
            <text:p>721701344</text:p>
          </table:table-cell>
          <table:table-cell office:value-type="float" office:value="28464" table:style-name="ce9">
            <text:p>28464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8"/>
          <table:table-cell table:style-name="ce7"/>
          <table:table-cell table:style-name="ce22"/>
          <table:table-cell table:style-name="ce9"/>
          <table:table-cell table:style-name="ce19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4.Maintenance of Building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Floor sanding and polishing of old library</text:p>
          </table:table-cell>
          <table:table-cell office:value-type="float" office:value="133545" table:style-name="ce27">
            <text:p>133545</text:p>
          </table:table-cell>
          <table:table-cell office:value-type="string" table:style-name="ce7">
            <text:p>Pinpoint hygiene services ltd</text:p>
          </table:table-cell>
          <table:table-cell office:value-type="string" table:style-name="ce9">
            <text:p>women</text:p>
          </table:table-cell>
          <table:table-cell office:value-type="string" table:style-name="ce9">
            <text:p>Jane Wachira</text:p>
          </table:table-cell>
          <table:table-cell office:value-type="float" office:value="721457488" table:style-name="ce9">
            <text:p>721457488</text:p>
          </table:table-cell>
          <table:table-cell office:value-type="float" office:value="64080" table:style-name="ce9">
            <text:p>6408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number-columns-repeated="3"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5.Cage maintene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6. Maintenance of mon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7.Tools and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Desktop computer</text:p>
          </table:table-cell>
          <table:table-cell office:value-type="float" office:value="133548" table:style-name="ce19">
            <text:p>133548</text:p>
          </table:table-cell>
          <table:table-cell office:value-type="string" table:style-name="ce12">
            <text:p>Newaki prime ltd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John Kimathi</text:p>
          </table:table-cell>
          <table:table-cell office:value-type="float" office:value="713310075" table:style-name="ce6">
            <text:p>713310075</text:p>
          </table:table-cell>
          <table:table-cell office:value-type="float" office:value="197500" table:style-name="ce6">
            <text:p>197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Hp pro desk 400 tt systems</text:p>
          </table:table-cell>
          <table:table-cell office:value-type="float" office:value="133657" table:style-name="ce19">
            <text:p>133657</text:p>
          </table:table-cell>
          <table:table-cell office:value-type="string" table:style-name="ce12">
            <text:p>Kenya Toner and ink suppli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florence Nzis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122193" table:style-name="ce6">
            <text:p>122193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Fridge thermometer and digital timers</text:p>
          </table:table-cell>
          <table:table-cell office:value-type="float" office:value="133780" table:style-name="ce19">
            <text:p>133780</text:p>
          </table:table-cell>
          <table:table-cell office:value-type="string" table:style-name="ce12">
            <text:p>Dasomic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Maurice Awino</text:p>
          </table:table-cell>
          <table:table-cell office:value-type="float" office:value="705720501" table:style-name="ce6">
            <text:p>705720501</text:p>
          </table:table-cell>
          <table:table-cell office:value-type="float" office:value="11400" table:style-name="ce6">
            <text:p>11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8.Equipments Repairs and Maintena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elter toledo LE PH Elecrodes</text:p>
          </table:table-cell>
          <table:table-cell office:value-type="float" office:value="133654" table:style-name="ce27">
            <text:p>133654</text:p>
          </table:table-cell>
          <table:table-cell office:value-type="string" table:style-name="ce7">
            <text:p>sciencescope limite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Ian Ochieng</text:p>
          </table:table-cell>
          <table:table-cell office:value-type="float" office:value="725951961" table:style-name="ce22">
            <text:p>725951961</text:p>
          </table:table-cell>
          <table:table-cell office:value-type="float" office:value="26500" table:style-name="ce9">
            <text:p>26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Genset repair,</text:p>
          </table:table-cell>
          <table:table-cell office:value-type="float" office:value="133666" table:style-name="ce27">
            <text:p>133666</text:p>
          </table:table-cell>
          <table:table-cell office:value-type="string" table:style-name="ce7">
            <text:p>Blackwood Hodge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Charles Gichanga</text:p>
          </table:table-cell>
          <table:table-cell office:value-type="float" office:value="720556382" table:style-name="ce22">
            <text:p>720556382</text:p>
          </table:table-cell>
          <table:table-cell office:value-type="float" office:value="48720" table:style-name="ce9">
            <text:p>48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Repair of incinerators</text:p>
          </table:table-cell>
          <table:table-cell office:value-type="float" office:value="133683" table:style-name="ce19">
            <text:p>133683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14500" table:style-name="ce7">
            <text:p>1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Check repair and service of laundry machine</text:p>
          </table:table-cell>
          <table:table-cell office:value-type="float" office:value="133699" table:style-name="ce19">
            <text:p>133699</text:p>
          </table:table-cell>
          <table:table-cell office:value-type="string" table:style-name="ce12">
            <text:p>Elecrical and general applianc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Philip M</text:p>
          </table:table-cell>
          <table:table-cell office:value-type="float" office:value="20555985" table:style-name="ce6">
            <text:p>20555985</text:p>
          </table:table-cell>
          <table:table-cell office:value-type="float" office:value="29592" table:style-name="ce7">
            <text:p>2959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repair of scotman icemaker and hair fridge</text:p>
          </table:table-cell>
          <table:table-cell office:value-type="float" office:value="133756" table:style-name="ce19">
            <text:p>133756</text:p>
          </table:table-cell>
          <table:table-cell office:value-type="string" table:style-name="ce12">
            <text:p>Linear Diagnostic E.A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Erick Ndugu</text:p>
          </table:table-cell>
          <table:table-cell office:value-type="float" office:value="722625806" table:style-name="ce6">
            <text:p>722625806</text:p>
          </table:table-cell>
          <table:table-cell office:value-type="float" office:value="62000" table:style-name="ce7">
            <text:p>6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major service of standby generator</text:p>
          </table:table-cell>
          <table:table-cell office:value-type="float" office:value="133781" table:style-name="ce19">
            <text:p>133781</text:p>
          </table:table-cell>
          <table:table-cell office:value-type="string" table:style-name="ce12">
            <text:p>Blackwood Hodge Ltd</text:p>
          </table:table-cell>
          <table:table-cell office:value-type="string" table:style-name="ce6">
            <text:p>General</text:p>
          </table:table-cell>
          <table:table-cell office:value-type="string" table:style-name="ce22">
            <text:p>Charles Gichanga</text:p>
          </table:table-cell>
          <table:table-cell office:value-type="float" office:value="720556382" table:style-name="ce22">
            <text:p>720556382</text:p>
          </table:table-cell>
          <table:table-cell office:value-type="float" office:value="43094" table:style-name="ce7">
            <text:p>4309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emergency repair of <text:s/>cold room</text:p>
          </table:table-cell>
          <table:table-cell office:value-type="float" office:value="133786" table:style-name="ce19">
            <text:p>133786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49500" table:style-name="ce7">
            <text:p>495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style-name="ce12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style-name="ce22"/>
          <table:table-cell table:style-name="ce32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9.First Aid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0.Uniform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1.Food <text:s/>for Ration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2. Air Far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4">
          <table:table-cell table:style-name="ce6"/>
          <table:table-cell table:style-name="ce7"/>
          <table:table-cell table:style-name="ce19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3. Food for Primat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ice pencils</text:p>
          </table:table-cell>
          <table:table-cell office:value-type="float" office:value="133682" table:style-name="ce27">
            <text:p>133682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14075" table:style-name="ce9">
            <text:p>1407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monkey cubes</text:p>
          </table:table-cell>
          <table:table-cell office:value-type="float" office:value="133696" table:style-name="ce27">
            <text:p>133696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492337" table:style-name="ce9">
            <text:p>492337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4. Medical and Surgical instr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5.Medical Supplies Consumabl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Medical <text:s/>supplies</text:p>
          </table:table-cell>
          <table:table-cell office:value-type="float" office:value="133542" table:style-name="ce19">
            <text:p>133542</text:p>
          </table:table-cell>
          <table:table-cell office:value-type="string" table:style-name="ce12">
            <text:p>Wanjugi Agencies</text:p>
          </table:table-cell>
          <table:table-cell office:value-type="string" table:style-name="ce6">
            <text:p>Genaral</text:p>
          </table:table-cell>
          <table:table-cell office:value-type="string" table:style-name="ce12">
            <text:p>David Komu</text:p>
          </table:table-cell>
          <table:table-cell office:value-type="float" office:value="722761770" table:style-name="ce19">
            <text:p>722761770</text:p>
          </table:table-cell>
          <table:table-cell office:value-type="float" office:value="89250" table:style-name="ce6">
            <text:p>892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Medical <text:s/>supplies</text:p>
          </table:table-cell>
          <table:table-cell office:value-type="float" office:value="133543" table:style-name="ce19">
            <text:p>133543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90360" table:style-name="ce6">
            <text:p>903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sterile surgical blades</text:p>
          </table:table-cell>
          <table:table-cell office:value-type="float" office:value="133544" table:style-name="ce19">
            <text:p>133544</text:p>
          </table:table-cell>
          <table:table-cell office:value-type="string" table:style-name="ce12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14600" table:style-name="ce6">
            <text:p>14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virus transport media collection kit</text:p>
          </table:table-cell>
          <table:table-cell office:value-type="float" office:value="133553" table:style-name="ce19">
            <text:p>133553</text:p>
          </table:table-cell>
          <table:table-cell office:value-type="string" table:style-name="ce12">
            <text:p>Medlab scientific co.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Abigail Njoki</text:p>
          </table:table-cell>
          <table:table-cell office:value-type="float" office:value="719852328" table:style-name="ce19">
            <text:p>719852328</text:p>
          </table:table-cell>
          <table:table-cell office:value-type="float" office:value="108000" table:style-name="ce6">
            <text:p>108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Covid 19 sampling kit</text:p>
          </table:table-cell>
          <table:table-cell office:value-type="float" office:value="133655" table:style-name="ce19">
            <text:p>133655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6000" table:style-name="ce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Red Biohazard bags</text:p>
          </table:table-cell>
          <table:table-cell office:value-type="float" office:value="133656" table:style-name="ce19">
            <text:p>133656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800" table:style-name="ce6">
            <text:p>3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Covid 19 Detection Kit</text:p>
          </table:table-cell>
          <table:table-cell office:value-type="float" office:value="133673" table:style-name="ce19">
            <text:p>133673</text:p>
          </table:table-cell>
          <table:table-cell office:value-type="string" table:style-name="ce12">
            <text:p>Skytech Africa supplies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John Njue</text:p>
          </table:table-cell>
          <table:table-cell office:value-type="float" office:value="724837769" table:style-name="ce19">
            <text:p>724837769</text:p>
          </table:table-cell>
          <table:table-cell office:value-type="float" office:value="668000" table:style-name="ce6">
            <text:p>668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Covid 19 RNA Extraction kit</text:p>
          </table:table-cell>
          <table:table-cell office:value-type="float" office:value="133674" table:style-name="ce19">
            <text:p>133674</text:p>
          </table:table-cell>
          <table:table-cell office:value-type="string" table:style-name="ce12">
            <text:p>Africa Biosystem ltd</text:p>
          </table:table-cell>
          <table:table-cell office:value-type="string" table:style-name="ce6">
            <text:p>General</text:p>
          </table:table-cell>
          <table:table-cell office:value-type="string" table:style-name="ce12">
            <text:p>Janmohamed Verjee</text:p>
          </table:table-cell>
          <table:table-cell office:value-type="float" office:value="733895265" table:style-name="ce19">
            <text:p>733895265</text:p>
          </table:table-cell>
          <table:table-cell office:value-type="float" office:value="286610" table:style-name="ce6">
            <text:p>28661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Swabs for Bat sample</text:p>
          </table:table-cell>
          <table:table-cell office:value-type="float" office:value="133675" table:style-name="ce19">
            <text:p>133675</text:p>
          </table:table-cell>
          <table:table-cell office:value-type="string" table:style-name="ce12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20020" table:style-name="ce6">
            <text:p>200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Covid 19 sample collection kit</text:p>
          </table:table-cell>
          <table:table-cell office:value-type="float" office:value="133686" table:style-name="ce19">
            <text:p>133686</text:p>
          </table:table-cell>
          <table:table-cell office:value-type="string" table:style-name="ce12">
            <text:p>Medlab scientific co.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Abigail Njoki</text:p>
          </table:table-cell>
          <table:table-cell office:value-type="float" office:value="719852328" table:style-name="ce19">
            <text:p>719852328</text:p>
          </table:table-cell>
          <table:table-cell office:value-type="float" office:value="36000" table:style-name="ce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4">
            <text:p>2-mectaptoethanol 99+<text:span text:style-name="T2">%</text:span></text:p>
          </table:table-cell>
          <table:table-cell office:value-type="float" office:value="133751" table:style-name="ce35">
            <text:p>133751</text:p>
          </table:table-cell>
          <table:table-cell office:value-type="string" table:style-name="ce34">
            <text:p>Kobian Kenya ltd</text:p>
          </table:table-cell>
          <table:table-cell office:value-type="string" table:style-name="ce25">
            <text:p>Genaral</text:p>
          </table:table-cell>
          <table:table-cell office:value-type="string" table:style-name="ce34">
            <text:p>Darash Patel</text:p>
          </table:table-cell>
          <table:table-cell office:value-type="float" office:value="723888006" table:style-name="ce35">
            <text:p>723888006</text:p>
          </table:table-cell>
          <table:table-cell office:value-type="float" office:value="9860" table:style-name="ce36">
            <text:p>98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" table:style-name="ce33">
            <text:p>12</text:p>
          </table:table-cell>
          <table:table-cell office:value-type="string" table:style-name="ce34">
            <text:p>ALSOFT Sanitizer</text:p>
          </table:table-cell>
          <table:table-cell office:value-type="float" office:value="133782" table:style-name="ce35">
            <text:p>133782</text:p>
          </table:table-cell>
          <table:table-cell office:value-type="string" table:style-name="ce34">
            <text:p>Saraya Kenya co.ltd</text:p>
          </table:table-cell>
          <table:table-cell office:value-type="string" table:style-name="ce25">
            <text:p>General</text:p>
          </table:table-cell>
          <table:table-cell office:value-type="string" table:style-name="ce34">
            <text:p>Victor</text:p>
          </table:table-cell>
          <table:table-cell office:value-type="float" office:value="717355933" table:style-name="ce35">
            <text:p>717355933</text:p>
          </table:table-cell>
          <table:table-cell office:value-type="float" office:value="36000" table:style-name="ce3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" table:style-name="ce33">
            <text:p>13</text:p>
          </table:table-cell>
          <table:table-cell office:value-type="string" table:style-name="ce34">
            <text:p>Surgical face masks and bio hazard bags</text:p>
          </table:table-cell>
          <table:table-cell office:value-type="float" office:value="133783" table:style-name="ce35">
            <text:p>133783</text:p>
          </table:table-cell>
          <table:table-cell office:value-type="string" table:style-name="ce34">
            <text:p>Vast scientific kenya</text:p>
          </table:table-cell>
          <table:table-cell office:value-type="string" table:style-name="ce25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22000" table:style-name="ce36">
            <text:p>2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4" table:style-name="ce33">
            <text:p>14</text:p>
          </table:table-cell>
          <table:table-cell office:value-type="string" table:style-name="ce34">
            <text:p>Black Polythene bags</text:p>
          </table:table-cell>
          <table:table-cell office:value-type="float" office:value="133784" table:style-name="ce35">
            <text:p>133784</text:p>
          </table:table-cell>
          <table:table-cell office:value-type="string" table:style-name="ce34">
            <text:p>Medi systems supply and services</text:p>
          </table:table-cell>
          <table:table-cell office:value-type="string" table:style-name="ce25">
            <text:p>General</text:p>
          </table:table-cell>
          <table:table-cell office:value-type="string" table:style-name="ce12">
            <text:p>Eric <text:s/>Munene</text:p>
          </table:table-cell>
          <table:table-cell office:value-type="float" office:value="721873005" table:style-name="ce19">
            <text:p>721873005</text:p>
          </table:table-cell>
          <table:table-cell office:value-type="float" office:value="4500" table:style-name="ce36">
            <text:p>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5" table:style-name="ce33">
            <text:p>15</text:p>
          </table:table-cell>
          <table:table-cell office:value-type="string" table:style-name="ce34">
            <text:p>Blood group seram</text:p>
          </table:table-cell>
          <table:table-cell office:value-type="float" office:value="133785" table:style-name="ce35">
            <text:p>133785</text:p>
          </table:table-cell>
          <table:table-cell office:value-type="string" table:style-name="ce34">
            <text:p>Chem-Labs ltd</text:p>
          </table:table-cell>
          <table:table-cell office:value-type="string" table:style-name="ce25">
            <text:p>General</text:p>
          </table:table-cell>
          <table:table-cell office:value-type="string" table:style-name="ce12">
            <text:p>Collins Mase</text:p>
          </table:table-cell>
          <table:table-cell office:value-type="float" office:value="722361336" table:style-name="ce19">
            <text:p>722361336</text:p>
          </table:table-cell>
          <table:table-cell office:value-type="float" office:value="2900" table:style-name="ce36">
            <text:p>29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25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6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number-columns-repeated="3" table:style-name="ce25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6. Lab Supplies Consum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laboratory consumables</text:p>
          </table:table-cell>
          <table:table-cell office:value-type="float" office:value="133651" table:style-name="ce7">
            <text:p>133651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8500" table:style-name="ce9">
            <text:p>38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Non-sterile ties1-10</text:p>
          </table:table-cell>
          <table:table-cell office:value-type="float" office:value="133652" table:style-name="ce7">
            <text:p>133652</text:p>
          </table:table-cell>
          <table:table-cell office:value-type="string" table:style-name="ce7">
            <text:p>Wanjugi Agencies</text:p>
          </table:table-cell>
          <table:table-cell office:value-type="string" table:style-name="ce6">
            <text:p>Genaral</text:p>
          </table:table-cell>
          <table:table-cell office:value-type="string" table:style-name="ce12">
            <text:p>David Komu</text:p>
          </table:table-cell>
          <table:table-cell office:value-type="float" office:value="722761770" table:style-name="ce19">
            <text:p>722761770</text:p>
          </table:table-cell>
          <table:table-cell office:value-type="float" office:value="4500" table:style-name="ce9">
            <text:p>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laboratory consumables</text:p>
          </table:table-cell>
          <table:table-cell office:value-type="float" office:value="133662" table:style-name="ce7">
            <text:p>133662</text:p>
          </table:table-cell>
          <table:table-cell office:value-type="string" table:style-name="ce7">
            <text:p>Skytech Africa Supplies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John Njue</text:p>
          </table:table-cell>
          <table:table-cell office:value-type="float" office:value="724837769" table:style-name="ce19">
            <text:p>724837769</text:p>
          </table:table-cell>
          <table:table-cell office:value-type="float" office:value="55500" table:style-name="ce9">
            <text:p>55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office:value-type="string" table:style-name="ce37">
            <text:p>filter tips</text:p>
          </table:table-cell>
          <table:table-cell office:value-type="float" office:value="133664" table:style-name="ce37">
            <text:p>133664</text:p>
          </table:table-cell>
          <table:table-cell office:value-type="string" table:style-name="ce3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42000" table:style-name="ce38">
            <text:p>4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office:value-type="string" table:style-name="ce37">
            <text:p>laboratory consumables</text:p>
          </table:table-cell>
          <table:table-cell office:value-type="float" office:value="133684" table:style-name="ce37">
            <text:p>133684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191900" table:style-name="ce38">
            <text:p>1919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33">
            <text:p>6</text:p>
          </table:table-cell>
          <table:table-cell office:value-type="string" table:style-name="ce37">
            <text:p>Eperndorf tubes and nitrile gloves</text:p>
          </table:table-cell>
          <table:table-cell office:value-type="float" office:value="133685" table:style-name="ce37">
            <text:p>133685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76100" table:style-name="ce38">
            <text:p>761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33">
            <text:p>7</text:p>
          </table:table-cell>
          <table:table-cell office:value-type="string" table:style-name="ce37">
            <text:p>filter tips</text:p>
          </table:table-cell>
          <table:table-cell office:value-type="float" office:value="133752" table:style-name="ce37">
            <text:p>133752</text:p>
          </table:table-cell>
          <table:table-cell office:value-type="string" table:style-name="ce3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62450" table:style-name="ce38">
            <text:p>624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33">
            <text:p>8</text:p>
          </table:table-cell>
          <table:table-cell office:value-type="string" table:style-name="ce37">
            <text:p>Nitule Gloves</text:p>
          </table:table-cell>
          <table:table-cell office:value-type="float" office:value="133753" table:style-name="ce37">
            <text:p>133753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32600" table:style-name="ce38">
            <text:p>32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33">
            <text:p>9</text:p>
          </table:table-cell>
          <table:table-cell office:value-type="string" table:style-name="ce37">
            <text:p>Exosap-IT 100RAN</text:p>
          </table:table-cell>
          <table:table-cell office:value-type="float" office:value="133771" table:style-name="ce37">
            <text:p>133771</text:p>
          </table:table-cell>
          <table:table-cell office:value-type="string" table:style-name="ce37">
            <text:p>Africa Biosystem ltd</text:p>
          </table:table-cell>
          <table:table-cell office:value-type="string" table:style-name="ce6">
            <text:p>General</text:p>
          </table:table-cell>
          <table:table-cell office:value-type="string" table:style-name="ce12">
            <text:p>Janmohamed Verjee</text:p>
          </table:table-cell>
          <table:table-cell office:value-type="float" office:value="733895265" table:style-name="ce19">
            <text:p>733895265</text:p>
          </table:table-cell>
          <table:table-cell office:value-type="float" office:value="20741" table:style-name="ce38">
            <text:p>20741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33">
            <text:p>10</text:p>
          </table:table-cell>
          <table:table-cell office:value-type="string" table:style-name="ce37">
            <text:p>laboratory consumables</text:p>
          </table:table-cell>
          <table:table-cell office:value-type="float" office:value="133777" table:style-name="ce37">
            <text:p>133777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25000" table:style-name="ce38">
            <text:p>25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7">
            <text:p>Nitrate gloves and microcentrifuge</text:p>
          </table:table-cell>
          <table:table-cell office:value-type="float" office:value="133779" table:style-name="ce37">
            <text:p>133779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14980" table:style-name="ce38">
            <text:p>14980</text:p>
          </table:table-cell>
          <table:table-cell table:style-name="ce10"/>
          <table:table-cell table:number-columns-repeated="16375"/>
        </table:table-row>
        <table:table-row table:number-rows-repeated="3" table:style-name="ro3">
          <table:table-cell table:style-name="ce33"/>
          <table:table-cell table:number-columns-repeated="3" table:style-name="ce37"/>
          <table:table-cell table:style-name="ce6"/>
          <table:table-cell table:style-name="ce12"/>
          <table:table-cell table:style-name="ce19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number-columns-repeated="3" table:style-name="ce37"/>
          <table:table-cell table:style-name="ce39"/>
          <table:table-cell table:style-name="ce40"/>
          <table:table-cell table:style-name="ce41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7"/>
          <table:table-cell table:style-name="ce42"/>
          <table:table-cell table:style-name="ce37"/>
          <table:table-cell table:style-name="ce39"/>
          <table:table-cell table:number-columns-repeated="2" table:style-name="ce43"/>
          <table:table-cell table:style-name="ce38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57">
            <text:p><text:s text:c="118"/><text:span text:style-name="T3"><text:s text:c="4"/>27.food for reptiles</text:span>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table:style-name="ce37"/>
          <table:table-cell table:style-name="ce42"/>
          <table:table-cell table:style-name="ce37"/>
          <table:table-cell table:number-columns-repeated="3" table:style-name="ce43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table:style-name="ce37"/>
          <table:table-cell table:style-name="ce42"/>
          <table:table-cell table:style-name="ce37"/>
          <table:table-cell table:number-columns-repeated="3" table:style-name="ce43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8. Ga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fill of medical oxygen and nitrogen gas</text:p>
          </table:table-cell>
          <table:table-cell office:value-type="float" office:value="133671" table:style-name="ce19">
            <text:p>133671</text:p>
          </table:table-cell>
          <table:table-cell office:value-type="string" table:style-name="ce7">
            <text:p>BOC Keny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Fidelis</text:p>
          </table:table-cell>
          <table:table-cell office:value-type="float" office:value="710261899" table:style-name="ce9">
            <text:p>710261899</text:p>
          </table:table-cell>
          <table:table-cell office:value-type="float" office:value="37220" table:style-name="ce9">
            <text:p>372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Liquid nitrogen gas</text:p>
          </table:table-cell>
          <table:table-cell office:value-type="float" office:value="133681" table:style-name="ce19">
            <text:p>133681</text:p>
          </table:table-cell>
          <table:table-cell office:value-type="string" table:style-name="ce7">
            <text:p>Kenya Animal Genetics Resource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amau</text:p>
          </table:table-cell>
          <table:table-cell office:value-type="float" office:value="721965404" table:style-name="ce9">
            <text:p>721965404</text:p>
          </table:table-cell>
          <table:table-cell office:value-type="float" office:value="29000" table:style-name="ce9">
            <text:p>29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Refil of CO2 gas</text:p>
          </table:table-cell>
          <table:table-cell office:value-type="float" office:value="133691" table:style-name="ce19">
            <text:p>133691</text:p>
          </table:table-cell>
          <table:table-cell office:value-type="string" table:style-name="ce7">
            <text:p>Carbacid CO2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</text:p>
          </table:table-cell>
          <table:table-cell office:value-type="float" office:value="721341426" table:style-name="ce9">
            <text:p>721341426</text:p>
          </table:table-cell>
          <table:table-cell office:value-type="float" office:value="1800" table:style-name="ce9">
            <text:p>1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CO2 Regulator</text:p>
          </table:table-cell>
          <table:table-cell office:value-type="float" office:value="133692" table:style-name="ce19">
            <text:p>133692</text:p>
          </table:table-cell>
          <table:table-cell office:value-type="string" table:style-name="ce7">
            <text:p>Carbacid CO2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</text:p>
          </table:table-cell>
          <table:table-cell office:value-type="float" office:value="721341426" table:style-name="ce9">
            <text:p>721341426</text:p>
          </table:table-cell>
          <table:table-cell office:value-type="float" office:value="17600" table:style-name="ce9">
            <text:p>17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Liquid nitrogen gas</text:p>
          </table:table-cell>
          <table:table-cell office:value-type="float" office:value="133759" table:style-name="ce19">
            <text:p>133759</text:p>
          </table:table-cell>
          <table:table-cell office:value-type="string" table:style-name="ce7">
            <text:p>Kenya Animal Genetics Resource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amau</text:p>
          </table:table-cell>
          <table:table-cell office:value-type="float" office:value="721965404" table:style-name="ce9">
            <text:p>721965404</text:p>
          </table:table-cell>
          <table:table-cell office:value-type="float" office:value="29000" table:style-name="ce9">
            <text:p>290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9.Fertiliz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0. Library Books / Journ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1..Bind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2.Line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3. Colony Suppl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44"/>
          <table:table-cell table:style-name="ce45"/>
          <table:table-cell table:style-name="ce46"/>
          <table:table-cell table:number-columns-repeated="5"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4.Manur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5.Interne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4">
          <table:table-cell office:value-type="string" table:number-columns-spanned="8" table:number-rows-spanned="1" table:style-name="ce58">
            <text:p>36. Multimedia Expen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7.Building <text:s/>mate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placement bars for gate pillars</text:p>
          </table:table-cell>
          <table:table-cell office:value-type="float" office:value="133762" table:style-name="ce19">
            <text:p>133762</text:p>
          </table:table-cell>
          <table:table-cell office:value-type="string" table:style-name="ce7">
            <text:p>Riam General supplies</text:p>
          </table:table-cell>
          <table:table-cell office:value-type="string" table:style-name="ce9">
            <text:p>youth</text:p>
          </table:table-cell>
          <table:table-cell office:value-type="string" table:style-name="ce9">
            <text:p>miriam Njambi</text:p>
          </table:table-cell>
          <table:table-cell office:value-type="float" office:value="706802609" table:style-name="ce9">
            <text:p>706802609</text:p>
          </table:table-cell>
          <table:table-cell office:value-type="float" office:value="23640" table:style-name="ce9">
            <text:p>23640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8.Hardware consuma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paints,nails,paint brushes and poly fillers</text:p>
          </table:table-cell>
          <table:table-cell office:value-type="float" office:value="133678" table:style-name="ce47">
            <text:p>133678</text:p>
          </table:table-cell>
          <table:table-cell office:value-type="string" table:style-name="ce7">
            <text:p>Danbecos Enterprises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Daniel Muinde</text:p>
          </table:table-cell>
          <table:table-cell office:value-type="float" office:value="717694770" table:style-name="ce22">
            <text:p>717694770</text:p>
          </table:table-cell>
          <table:table-cell office:value-type="float" office:value="43868" table:style-name="ce9">
            <text:p>4386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hardware consumables</text:p>
          </table:table-cell>
          <table:table-cell office:value-type="float" office:value="133679" table:style-name="ce47">
            <text:p>133679</text:p>
          </table:table-cell>
          <table:table-cell office:value-type="string" table:style-name="ce7">
            <text:p>Johand General Supplie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Jonathon Kilonzo</text:p>
          </table:table-cell>
          <table:table-cell office:value-type="float" office:value="712394489" table:style-name="ce22">
            <text:p>712394489</text:p>
          </table:table-cell>
          <table:table-cell office:value-type="float" office:value="73627" table:style-name="ce9">
            <text:p>7362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hardaware consumables</text:p>
          </table:table-cell>
          <table:table-cell office:value-type="float" office:value="133680" table:style-name="ce47">
            <text:p>133680</text:p>
          </table:table-cell>
          <table:table-cell office:value-type="string" table:style-name="ce7">
            <text:p>Johand General Supplie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Jonathon Kilonzo</text:p>
          </table:table-cell>
          <table:table-cell office:value-type="float" office:value="712394489" table:style-name="ce22">
            <text:p>712394489</text:p>
          </table:table-cell>
          <table:table-cell office:value-type="float" office:value="37660" table:style-name="ce9">
            <text:p>376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hardware consumables</text:p>
          </table:table-cell>
          <table:table-cell office:value-type="float" office:value="133693" table:style-name="ce47">
            <text:p>133693</text:p>
          </table:table-cell>
          <table:table-cell office:value-type="string" table:style-name="ce7">
            <text:p>Sanol Holding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Grace</text:p>
          </table:table-cell>
          <table:table-cell office:value-type="float" office:value="723898149" table:style-name="ce22">
            <text:p>723898149</text:p>
          </table:table-cell>
          <table:table-cell office:value-type="float" office:value="167760" table:style-name="ce9">
            <text:p>1677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hardware consumables</text:p>
          </table:table-cell>
          <table:table-cell office:value-type="float" office:value="133760" table:style-name="ce47">
            <text:p>133760</text:p>
          </table:table-cell>
          <table:table-cell office:value-type="string" table:style-name="ce7">
            <text:p>Sanol Holding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Grace</text:p>
          </table:table-cell>
          <table:table-cell office:value-type="float" office:value="723898149" table:style-name="ce22">
            <text:p>723898149</text:p>
          </table:table-cell>
          <table:table-cell office:value-type="float" office:value="7320" table:style-name="ce9">
            <text:p>732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47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48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58">
            <text:p>39. Spare Parts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number-columns-repeated="2" table:style-name="ce10"/>
          <table:table-cell office:value-type="string" table:style-name="ce49">
            <text:p>40.subscription fees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6" table:style-name="ce1"/>
          <table:table-cell table:style-name="ce50"/>
          <table:table-cell table:number-columns-repeated="16368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number-columns-repeated="2" table:style-name="ce10"/>
          <table:table-cell office:value-type="string" table:style-name="ce51">
            <text:p>41.Staff welfare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10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number-rows-repeated="6"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/>
        </table:table-row>
        <table:table-row table:number-rows-repeated="1048122" table:style-name="ro1">
          <table:table-cell table:number-columns-repeated="16384"/>
        </table:table-row>
      </table:table>
      <table:table table:name="_3RD_QUARTER_LOCAL_GOODS_REPORT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number-columns-repeated="1016" table:default-cell-style-name="ce1"/>
        <table:table-column table:style-name="co1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6">
          <table:table-cell table:number-columns-repeated="4" table:style-name="ce59"/>
          <table:table-cell office:value-type="string" table:style-name="ce60">
            <text:p>INSTITUTE OF PRIMATE RESEARCH</text:p>
          </table:table-cell>
          <table:table-cell table:number-columns-repeated="2" table:style-name="ce59"/>
          <table:table-cell table:style-name="ce59">
            <draw:custom-shape svg:x="0.0594in" svg:y="0in" svg:width="0.0004in" svg:height="0.2039in" draw:z-index="1" draw:id="id0" draw:style-name="a2" draw:name="TextBox 4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59"/>
          <table:table-cell table:number-columns-repeated="16374"/>
        </table:table-row>
        <table:table-row table:style-name="ro7">
          <table:table-cell table:number-columns-repeated="10" table:style-name="ce59"/>
          <table:table-cell table:number-columns-repeated="16374"/>
        </table:table-row>
        <table:table-row table:style-name="ro8">
          <table:table-cell table:style-name="ce61"/>
          <table:table-cell table:number-columns-repeated="2" table:style-name="ce62"/>
          <table:table-cell office:value-type="string" table:style-name="ce62">
            <text:p>LOCAL GOODS REPORT 3rd QUARTER</text:p>
          </table:table-cell>
          <table:table-cell office:value-type="string" table:style-name="ce63">
            <text:p>INSTITUTE OF PRIMATE RESEARCH JAN -MARCH 2022</text:p>
          </table:table-cell>
          <table:table-cell office:value-type="string" table:style-name="ce61">
            <text:p>REGION<text:s/><text:span text:style-name="T4">(Fill<text:s/></text:span><text:span text:style-name="T4">Below)</text:span></text:p>
          </table:table-cell>
          <table:table-cell table:style-name="ce62"/>
          <table:table-cell office:value-type="string" table:style-name="ce64">
            <text:p>FINANCIAL YEAR<text:s/><text:span text:style-name="T5">2021/22</text:span></text:p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table:style-name="ce65"/>
          <table:table-cell table:number-columns-repeated="3" table:style-name="ce66"/>
          <table:table-cell table:style-name="ce67"/>
          <table:table-cell table:style-name="ce68"/>
          <table:table-cell table:style-name="ce69"/>
          <table:table-cell table:style-name="ce70"/>
          <table:table-cell table:number-columns-repeated="2" table:style-name="ce59"/>
          <table:table-cell table:number-columns-repeated="16374"/>
        </table:table-row>
        <table:table-row table:style-name="ro9">
          <table:table-cell office:value-type="string" table:style-name="ce71">
            <text:p>DATE</text:p>
          </table:table-cell>
          <table:table-cell office:value-type="string" table:style-name="ce71">
            <text:p>D.O.F</text:p>
          </table:table-cell>
          <table:table-cell office:value-type="string" table:style-name="ce71">
            <text:p>L.P.O</text:p>
          </table:table-cell>
          <table:table-cell office:value-type="string" table:style-name="ce71">
            <text:p>DEPARTMENTS</text:p>
          </table:table-cell>
          <table:table-cell office:value-type="string" table:style-name="ce71">
            <text:p>ITEM <text:s/>DESCRIPTIONS</text:p>
          </table:table-cell>
          <table:table-cell office:value-type="string" table:style-name="ce71">
            <text:p>SUPPLIERS NAME</text:p>
          </table:table-cell>
          <table:table-cell office:value-type="string" table:style-name="ce71">
            <text:p>AMOUNT</text:p>
          </table:table-cell>
          <table:table-cell office:value-type="string" table:style-name="ce71">
            <text:p>BUY KENYA BUILD KENYA</text:p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164" table:style-name="ce73">
            <text:p>13164</text:p>
          </table:table-cell>
          <table:table-cell office:value-type="float" office:value="133572" table:style-name="ce74">
            <text:p>13357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266" table:style-name="ce73">
            <text:p>13266</text:p>
          </table:table-cell>
          <table:table-cell office:value-type="float" office:value="133574" table:style-name="ce74">
            <text:p>13357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3" table:style-name="ce79">
            <text:p>13163</text:p>
          </table:table-cell>
          <table:table-cell office:value-type="float" office:value="133575" table:style-name="ce74">
            <text:p>13357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 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265" table:style-name="ce79">
            <text:p>13265</text:p>
          </table:table-cell>
          <table:table-cell office:value-type="float" office:value="133576" table:style-name="ce74">
            <text:p>13357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267" table:style-name="ce79">
            <text:p>13267</text:p>
          </table:table-cell>
          <table:table-cell office:value-type="float" office:value="133577" table:style-name="ce74">
            <text:p>13357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12-18T00:00:00" table:style-name="ce78">
            <text:p>12/18/2022</text:p>
          </table:table-cell>
          <table:table-cell office:value-type="float" office:value="13266" table:style-name="ce79">
            <text:p>13266</text:p>
          </table:table-cell>
          <table:table-cell office:value-type="float" office:value="133578" table:style-name="ce74">
            <text:p>13357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901" table:style-name="ce79">
            <text:p>13901</text:p>
          </table:table-cell>
          <table:table-cell office:value-type="float" office:value="133579" table:style-name="ce74">
            <text:p>13357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3" table:style-name="ce79">
            <text:p>13863</text:p>
          </table:table-cell>
          <table:table-cell office:value-type="float" office:value="133580" table:style-name="ce74">
            <text:p>13358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4" table:style-name="ce79">
            <text:p>13864</text:p>
          </table:table-cell>
          <table:table-cell office:value-type="float" office:value="133581" table:style-name="ce74">
            <text:p>13358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5" table:style-name="ce79">
            <text:p>13865</text:p>
          </table:table-cell>
          <table:table-cell office:value-type="float" office:value="133582" table:style-name="ce74">
            <text:p>13358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7" table:style-name="ce79">
            <text:p>13867</text:p>
          </table:table-cell>
          <table:table-cell office:value-type="float" office:value="133583" table:style-name="ce74">
            <text:p>13358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74" table:style-name="ce79">
            <text:p>13874</text:p>
          </table:table-cell>
          <table:table-cell office:value-type="float" office:value="133584" table:style-name="ce74">
            <text:p>13358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4" table:style-name="ce79">
            <text:p>13164</text:p>
          </table:table-cell>
          <table:table-cell office:value-type="float" office:value="133585" table:style-name="ce74">
            <text:p>13358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568" table:style-name="ce79">
            <text:p>13568</text:p>
          </table:table-cell>
          <table:table-cell office:value-type="float" office:value="133586" table:style-name="ce74">
            <text:p>13358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5T00:00:00" table:style-name="ce78">
            <text:p>01/15/2022</text:p>
          </table:table-cell>
          <table:table-cell office:value-type="float" office:value="13266" table:style-name="ce79">
            <text:p>13266</text:p>
          </table:table-cell>
          <table:table-cell office:value-type="float" office:value="133587" table:style-name="ce74">
            <text:p>13358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9" table:style-name="ce79">
            <text:p>13869</text:p>
          </table:table-cell>
          <table:table-cell office:value-type="float" office:value="133588" table:style-name="ce74">
            <text:p>13358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04T00:00:00" table:style-name="ce78">
            <text:p>01/04/2022</text:p>
          </table:table-cell>
          <table:table-cell office:value-type="float" office:value="3693" table:style-name="ce79">
            <text:p>3693</text:p>
          </table:table-cell>
          <table:table-cell office:value-type="float" office:value="133589" table:style-name="ce74">
            <text:p>13358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871" table:style-name="ce79">
            <text:p>13871</text:p>
          </table:table-cell>
          <table:table-cell office:value-type="float" office:value="133590" table:style-name="ce74">
            <text:p>13359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2">
            <text:p>01/12/2022</text:p>
          </table:table-cell>
          <table:table-cell office:value-type="float" office:value="13872" table:style-name="ce73">
            <text:p>13872</text:p>
          </table:table-cell>
          <table:table-cell office:value-type="float" office:value="133591" table:style-name="ce74">
            <text:p>13359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166" table:style-name="ce79">
            <text:p>13166</text:p>
          </table:table-cell>
          <table:table-cell office:value-type="float" office:value="133592" table:style-name="ce74">
            <text:p>133592</text:p>
          </table:table-cell>
          <table:table-cell office:value-type="string" table:style-name="ce75">
            <text:p>Transport</text:p>
          </table:table-cell>
          <table:table-cell office:value-type="string" table:style-name="ce82">
            <text:p>50 litres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873" table:style-name="ce79">
            <text:p>13873</text:p>
          </table:table-cell>
          <table:table-cell office:value-type="float" office:value="133593" table:style-name="ce74">
            <text:p>13359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875" table:style-name="ce79">
            <text:p>13875</text:p>
          </table:table-cell>
          <table:table-cell office:value-type="float" office:value="133594" table:style-name="ce74">
            <text:p>13359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7" table:style-name="ce76">
            <text:p><text:s/>13,277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168" table:style-name="ce79">
            <text:p>13168</text:p>
          </table:table-cell>
          <table:table-cell office:value-type="float" office:value="133595" table:style-name="ce74">
            <text:p>13359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2T00:00:00" table:style-name="ce78">
            <text:p>01/12/2022</text:p>
          </table:table-cell>
          <table:table-cell office:value-type="float" office:value="13676" table:style-name="ce79">
            <text:p>13676</text:p>
          </table:table-cell>
          <table:table-cell office:value-type="float" office:value="133596" table:style-name="ce74">
            <text:p>13359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877" table:style-name="ce79">
            <text:p>13877</text:p>
          </table:table-cell>
          <table:table-cell office:value-type="float" office:value="133597" table:style-name="ce74">
            <text:p>13359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167" table:style-name="ce79">
            <text:p>13167</text:p>
          </table:table-cell>
          <table:table-cell office:value-type="float" office:value="133598" table:style-name="ce74">
            <text:p>13359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0T00:00:00" table:style-name="ce78">
            <text:p>01/10/2022</text:p>
          </table:table-cell>
          <table:table-cell office:value-type="float" office:value="13271" table:style-name="ce79">
            <text:p>13271</text:p>
          </table:table-cell>
          <table:table-cell office:value-type="float" office:value="133599" table:style-name="ce74">
            <text:p>13359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274" table:style-name="ce79">
            <text:p>13274</text:p>
          </table:table-cell>
          <table:table-cell office:value-type="float" office:value="133600" table:style-name="ce74">
            <text:p>13360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3">
            <text:p>01/18/2022</text:p>
          </table:table-cell>
          <table:table-cell office:value-type="float" office:value="13879" table:style-name="ce84">
            <text:p>13879</text:p>
          </table:table-cell>
          <table:table-cell office:value-type="float" office:value="133601" table:style-name="ce74">
            <text:p>13360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5">
            <draw:custom-shape svg:x="0.0594in" svg:y="0.148in" svg:width="0.0004in" svg:height="0.226in" draw:z-index="2" draw:id="id1" draw:style-name="a5" draw:name="TextBox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78">
            <text:p>01/18/2022</text:p>
          </table:table-cell>
          <table:table-cell office:value-type="float" office:value="13906" table:style-name="ce79">
            <text:p>13906</text:p>
          </table:table-cell>
          <table:table-cell office:value-type="float" office:value="133602" table:style-name="ce74">
            <text:p>13360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20 litres petrol for lawn mower</text:p>
          </table:table-cell>
          <table:table-cell office:value-type="string" table:style-name="ce74">
            <text:p>Jeff Keraroponi</text:p>
          </table:table-cell>
          <table:table-cell office:value-type="float" office:value="2594" table:style-name="ce76">
            <text:p><text:s/>2,594.00<text:s/></text:p>
          </table:table-cell>
          <table:table-cell table:style-name="ce86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7">
            <text:p>01/18/2022</text:p>
          </table:table-cell>
          <table:table-cell office:value-type="float" office:value="13881" table:style-name="ce88">
            <text:p>13881</text:p>
          </table:table-cell>
          <table:table-cell office:value-type="float" office:value="133603" table:style-name="ce74">
            <text:p>13360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litres diesel for KCH 490Q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7">
            <text:p>01/18/2022</text:p>
          </table:table-cell>
          <table:table-cell office:value-type="float" office:value="13882" table:style-name="ce88">
            <text:p>13882</text:p>
          </table:table-cell>
          <table:table-cell office:value-type="float" office:value="133604" table:style-name="ce74">
            <text:p>13360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3T00:00:00" table:style-name="ce87">
            <text:p>01/13/2022</text:p>
          </table:table-cell>
          <table:table-cell office:value-type="float" office:value="13889" table:style-name="ce88">
            <text:p>13889</text:p>
          </table:table-cell>
          <table:table-cell office:value-type="float" office:value="133605" table:style-name="ce74">
            <text:p>13360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8T00:00:00" table:style-name="ce87">
            <text:p>01/18/2022</text:p>
          </table:table-cell>
          <table:table-cell office:value-type="float" office:value="13878" table:style-name="ce88">
            <text:p>13878</text:p>
          </table:table-cell>
          <table:table-cell office:value-type="float" office:value="133606" table:style-name="ce74">
            <text:p>13360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6696" table:style-name="ce76">
            <text:p><text:s/>16,696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7" table:style-name="ce88">
            <text:p>13277</text:p>
          </table:table-cell>
          <table:table-cell office:value-type="float" office:value="133607" table:style-name="ce74">
            <text:p>13360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72" table:style-name="ce76">
            <text:p><text:s/>8,872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5" table:style-name="ce88">
            <text:p>13275</text:p>
          </table:table-cell>
          <table:table-cell office:value-type="float" office:value="133608" table:style-name="ce74">
            <text:p>13360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6" table:style-name="ce88">
            <text:p>13276</text:p>
          </table:table-cell>
          <table:table-cell office:value-type="float" office:value="133609" table:style-name="ce74">
            <text:p>13360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 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5" table:style-name="ce88">
            <text:p>13885</text:p>
          </table:table-cell>
          <table:table-cell office:value-type="float" office:value="133610" table:style-name="ce74">
            <text:p>13361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169" table:style-name="ce88">
            <text:p>13169</text:p>
          </table:table-cell>
          <table:table-cell office:value-type="float" office:value="133611" table:style-name="ce74">
            <text:p>13361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7" table:style-name="ce88">
            <text:p>13887</text:p>
          </table:table-cell>
          <table:table-cell office:value-type="float" office:value="133612" table:style-name="ce74">
            <text:p>13361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3" table:style-name="ce88">
            <text:p>13883</text:p>
          </table:table-cell>
          <table:table-cell office:value-type="float" office:value="133613" table:style-name="ce74">
            <text:p>13361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4" table:style-name="ce88">
            <text:p>13884</text:p>
          </table:table-cell>
          <table:table-cell office:value-type="float" office:value="133614" table:style-name="ce74">
            <text:p>13361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6" table:style-name="ce88">
            <text:p>13886</text:p>
          </table:table-cell>
          <table:table-cell office:value-type="float" office:value="133615" table:style-name="ce74">
            <text:p>13361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78" table:style-name="ce88">
            <text:p>13878</text:p>
          </table:table-cell>
          <table:table-cell office:value-type="float" office:value="133616" table:style-name="ce74">
            <text:p>13361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1" table:style-name="ce88">
            <text:p>13891</text:p>
          </table:table-cell>
          <table:table-cell office:value-type="float" office:value="133617" table:style-name="ce74">
            <text:p>13361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78" table:style-name="ce88">
            <text:p>13278</text:p>
          </table:table-cell>
          <table:table-cell office:value-type="float" office:value="133618" table:style-name="ce74">
            <text:p>13361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8" table:style-name="ce88">
            <text:p>13888</text:p>
          </table:table-cell>
          <table:table-cell office:value-type="float" office:value="133619" table:style-name="ce74">
            <text:p>13361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80" table:style-name="ce88">
            <text:p>13280</text:p>
          </table:table-cell>
          <table:table-cell office:value-type="float" office:value="133620" table:style-name="ce74">
            <text:p>13362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79" table:style-name="ce88">
            <text:p>13279</text:p>
          </table:table-cell>
          <table:table-cell office:value-type="float" office:value="133621" table:style-name="ce74">
            <text:p>13362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920" table:style-name="ce88">
            <text:p>13920</text:p>
          </table:table-cell>
          <table:table-cell office:value-type="float" office:value="133622" table:style-name="ce74">
            <text:p>13362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0" table:style-name="ce88">
            <text:p>13890</text:p>
          </table:table-cell>
          <table:table-cell office:value-type="float" office:value="133623" table:style-name="ce74">
            <text:p>13362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4" table:style-name="ce88">
            <text:p>13894</text:p>
          </table:table-cell>
          <table:table-cell office:value-type="float" office:value="133624" table:style-name="ce74">
            <text:p>13362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925" table:style-name="ce88">
            <text:p>13925</text:p>
          </table:table-cell>
          <table:table-cell office:value-type="float" office:value="133625" table:style-name="ce74">
            <text:p>13362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0litres diesel for inci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2" table:style-name="ce88">
            <text:p>13892</text:p>
          </table:table-cell>
          <table:table-cell office:value-type="float" office:value="133626" table:style-name="ce74">
            <text:p>13362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5" table:style-name="ce88">
            <text:p>13895</text:p>
          </table:table-cell>
          <table:table-cell office:value-type="float" office:value="133627" table:style-name="ce74">
            <text:p>13362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89" table:style-name="ce88">
            <text:p>13889</text:p>
          </table:table-cell>
          <table:table-cell office:value-type="float" office:value="133628" table:style-name="ce74">
            <text:p>13362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1">
            <text:p>contract</text:p>
          </table:table-cell>
          <table:table-cell office:value-type="string" table:style-name="ce74">
            <text:p>contract</text:p>
          </table:table-cell>
          <table:table-cell office:value-type="string" table:style-name="ce74">
            <text:p>Supply of fruits and vegetables for jan22</text:p>
          </table:table-cell>
          <table:table-cell office:value-type="string" table:style-name="ce74">
            <text:p>Sirandu investment</text:p>
          </table:table-cell>
          <table:table-cell office:value-type="float" office:value="101200" table:style-name="ce91">
            <text:p>101200.00</text:p>
          </table:table-cell>
          <table:table-cell office:value-type="float" office:value="101200" table:style-name="ce91">
            <text:p>1012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7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jan 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7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jan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895" table:style-name="ce88">
            <text:p>13895</text:p>
          </table:table-cell>
          <table:table-cell office:value-type="float" office:value="133629" table:style-name="ce74">
            <text:p>13362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diesel <text:s/>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900" table:style-name="ce88">
            <text:p>13900</text:p>
          </table:table-cell>
          <table:table-cell office:value-type="float" office:value="133630" table:style-name="ce74">
            <text:p>13363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896" table:style-name="ce88">
            <text:p>13896</text:p>
          </table:table-cell>
          <table:table-cell office:value-type="float" office:value="133631" table:style-name="ce74">
            <text:p>13363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22T00:00:00" table:style-name="ce87">
            <text:p>02/22/2022</text:p>
          </table:table-cell>
          <table:table-cell office:value-type="float" office:value="13837" table:style-name="ce88">
            <text:p>13837</text:p>
          </table:table-cell>
          <table:table-cell office:value-type="float" office:value="133632" table:style-name="ce74">
            <text:p>13363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22T00:00:00" table:style-name="ce87">
            <text:p>02/22/2022</text:p>
          </table:table-cell>
          <table:table-cell office:value-type="float" office:value="13171" table:style-name="ce88">
            <text:p>13171</text:p>
          </table:table-cell>
          <table:table-cell office:value-type="float" office:value="133633" table:style-name="ce74">
            <text:p>13363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09T00:00:00" table:style-name="ce87">
            <text:p>02/09/2022</text:p>
          </table:table-cell>
          <table:table-cell office:value-type="float" office:value="133634" table:style-name="ce88">
            <text:p>133634</text:p>
          </table:table-cell>
          <table:table-cell office:value-type="float" office:value="133634" table:style-name="ce74">
            <text:p>13363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898" table:style-name="ce93">
            <text:p>13898</text:p>
          </table:table-cell>
          <table:table-cell office:value-type="float" office:value="133635" table:style-name="ce74">
            <text:p>13363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82" table:style-name="ce93">
            <text:p>13282</text:p>
          </table:table-cell>
          <table:table-cell office:value-type="float" office:value="133636" table:style-name="ce74">
            <text:p>13363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83" table:style-name="ce93">
            <text:p>13283</text:p>
          </table:table-cell>
          <table:table-cell office:value-type="float" office:value="133637" table:style-name="ce74">
            <text:p>13363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4T00:00:00" table:style-name="ce92">
            <text:p>02/04/2022</text:p>
          </table:table-cell>
          <table:table-cell office:value-type="float" office:value="13878" table:style-name="ce93">
            <text:p>13878</text:p>
          </table:table-cell>
          <table:table-cell office:value-type="float" office:value="133638" table:style-name="ce74">
            <text:p>13363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2" table:style-name="ce93">
            <text:p>14102</text:p>
          </table:table-cell>
          <table:table-cell office:value-type="float" office:value="133639" table:style-name="ce74">
            <text:p>13363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3" table:style-name="ce93">
            <text:p>14103</text:p>
          </table:table-cell>
          <table:table-cell office:value-type="float" office:value="133640" table:style-name="ce74">
            <text:p>13364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4" table:style-name="ce93">
            <text:p>14104</text:p>
          </table:table-cell>
          <table:table-cell office:value-type="float" office:value="133641" table:style-name="ce94">
            <text:p>13364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173" table:style-name="ce93">
            <text:p>13173</text:p>
          </table:table-cell>
          <table:table-cell office:value-type="float" office:value="133642" table:style-name="ce94">
            <text:p>13364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6" table:style-name="ce93">
            <text:p>13286</text:p>
          </table:table-cell>
          <table:table-cell office:value-type="float" office:value="133643" table:style-name="ce94">
            <text:p>13364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172" table:style-name="ce93">
            <text:p>13172</text:p>
          </table:table-cell>
          <table:table-cell office:value-type="float" office:value="133644" table:style-name="ce94">
            <text:p>13364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1" table:style-name="ce93">
            <text:p>14101</text:p>
          </table:table-cell>
          <table:table-cell office:value-type="float" office:value="133645" table:style-name="ce94">
            <text:p>13364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10" table:style-name="ce93">
            <text:p>14110</text:p>
          </table:table-cell>
          <table:table-cell office:value-type="float" office:value="133646" table:style-name="ce94">
            <text:p>13364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5" table:style-name="ce93">
            <text:p>14105</text:p>
          </table:table-cell>
          <table:table-cell office:value-type="float" office:value="133647" table:style-name="ce94">
            <text:p>13364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07" table:style-name="ce93">
            <text:p>14107</text:p>
          </table:table-cell>
          <table:table-cell office:value-type="float" office:value="133648" table:style-name="ce94">
            <text:p>13364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06" table:style-name="ce93">
            <text:p>14106</text:p>
          </table:table-cell>
          <table:table-cell office:value-type="float" office:value="133649" table:style-name="ce94">
            <text:p>13364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950" table:style-name="ce93">
            <text:p>13950</text:p>
          </table:table-cell>
          <table:table-cell office:value-type="float" office:value="133650" table:style-name="ce94">
            <text:p>13365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96">
            <text:p><text:s/>44,2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8" table:style-name="ce93">
            <text:p>13288</text:p>
          </table:table-cell>
          <table:table-cell office:value-type="float" office:value="133701" table:style-name="ce94">
            <text:p>13370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96">
            <text:p><text:s/>7,13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string" table:style-name="ce92">
            <text:p>29/02/2022</text:p>
          </table:table-cell>
          <table:table-cell office:value-type="float" office:value="13287" table:style-name="ce93">
            <text:p>13287</text:p>
          </table:table-cell>
          <table:table-cell office:value-type="float" office:value="133702" table:style-name="ce94">
            <text:p>13370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96">
            <text:p><text:s/>13,2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9" table:style-name="ce93">
            <text:p>13289</text:p>
          </table:table-cell>
          <table:table-cell office:value-type="float" office:value="133703" table:style-name="ce94">
            <text:p>13370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96">
            <text:p><text:s/>7,13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Supply of fruits and vegetables for feb22</text:p>
          </table:table-cell>
          <table:table-cell office:value-type="string" table:style-name="ce74">
            <text:p>Sirandu investment</text:p>
          </table:table-cell>
          <table:table-cell office:value-type="float" office:value="96400" table:style-name="ce91">
            <text:p>96400.00</text:p>
          </table:table-cell>
          <table:table-cell office:value-type="float" office:value="96400" table:style-name="ce91">
            <text:p>96400.00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feb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feb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0" table:style-name="ce93">
            <text:p>14110</text:p>
          </table:table-cell>
          <table:table-cell office:value-type="float" office:value="133704" table:style-name="ce94">
            <text:p>13370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3" table:style-name="ce93">
            <text:p>14113</text:p>
          </table:table-cell>
          <table:table-cell office:value-type="float" office:value="133705" table:style-name="ce94">
            <text:p>13370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184" table:style-name="ce96">
            <text:p><text:s/>7,18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1" table:style-name="ce93">
            <text:p>14111</text:p>
          </table:table-cell>
          <table:table-cell office:value-type="float" office:value="133706" table:style-name="ce94">
            <text:p>13370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96">
            <text:p><text:s/>16,5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2" table:style-name="ce93">
            <text:p>14112</text:p>
          </table:table-cell>
          <table:table-cell office:value-type="float" office:value="133707" table:style-name="ce94">
            <text:p>13370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08" table:style-name="ce93">
            <text:p>14108</text:p>
          </table:table-cell>
          <table:table-cell office:value-type="float" office:value="133708" table:style-name="ce94">
            <text:p>13370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09" table:style-name="ce93">
            <text:p>14109</text:p>
          </table:table-cell>
          <table:table-cell office:value-type="float" office:value="133709" table:style-name="ce94">
            <text:p>13370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5" table:style-name="ce93">
            <text:p>13175</text:p>
          </table:table-cell>
          <table:table-cell office:value-type="float" office:value="133711" table:style-name="ce94">
            <text:p>13371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6" table:style-name="ce93">
            <text:p>13176</text:p>
          </table:table-cell>
          <table:table-cell office:value-type="float" office:value="133712" table:style-name="ce94">
            <text:p>13371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291" table:style-name="ce93">
            <text:p>13291</text:p>
          </table:table-cell>
          <table:table-cell office:value-type="float" office:value="133713" table:style-name="ce94">
            <text:p>13371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4" table:style-name="ce93">
            <text:p>13174</text:p>
          </table:table-cell>
          <table:table-cell office:value-type="float" office:value="133714" table:style-name="ce94">
            <text:p>13371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5" table:style-name="ce93">
            <text:p>14115</text:p>
          </table:table-cell>
          <table:table-cell office:value-type="float" office:value="133715" table:style-name="ce94">
            <text:p>13371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16" table:style-name="ce94">
            <text:p>13371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96">
            <text:p><text:s/>13,2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7" table:style-name="ce93">
            <text:p>14117</text:p>
          </table:table-cell>
          <table:table-cell office:value-type="float" office:value="133717" table:style-name="ce94">
            <text:p>13371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96">
            <text:p><text:s/>6,6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8" table:style-name="ce93">
            <text:p>13178</text:p>
          </table:table-cell>
          <table:table-cell office:value-type="float" office:value="133718" table:style-name="ce94">
            <text:p>13371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9" table:style-name="ce93">
            <text:p>14119</text:p>
          </table:table-cell>
          <table:table-cell office:value-type="float" office:value="133719" table:style-name="ce94">
            <text:p>13371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7" table:style-name="ce93">
            <text:p>13177</text:p>
          </table:table-cell>
          <table:table-cell office:value-type="float" office:value="133720" table:style-name="ce94">
            <text:p>13372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21" table:style-name="ce93">
            <text:p>14121</text:p>
          </table:table-cell>
          <table:table-cell office:value-type="float" office:value="133721" table:style-name="ce94">
            <text:p>13372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96">
            <text:p><text:s/>16,5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4" table:style-name="ce93">
            <text:p>14114</text:p>
          </table:table-cell>
          <table:table-cell office:value-type="float" office:value="133722" table:style-name="ce94">
            <text:p>13372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8" table:style-name="ce93">
            <text:p>14118</text:p>
          </table:table-cell>
          <table:table-cell office:value-type="float" office:value="133723" table:style-name="ce94">
            <text:p>13372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24" table:style-name="ce94">
            <text:p>13372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6" table:style-name="ce93">
            <text:p>14116</text:p>
          </table:table-cell>
          <table:table-cell office:value-type="float" office:value="133725" table:style-name="ce94">
            <text:p>13372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0">
          <table:table-cell office:value-type="date" office:date-value="2022-03-09T00:00:00" table:style-name="ce92">
            <text:p>03/09/2022</text:p>
          </table:table-cell>
          <table:table-cell office:value-type="float" office:value="14120" table:style-name="ce93">
            <text:p>14120</text:p>
          </table:table-cell>
          <table:table-cell office:value-type="float" office:value="133726" table:style-name="ce94">
            <text:p>13372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96">
            <text:p><text:s/>6,6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16" table:style-name="ce93">
            <text:p>14116</text:p>
          </table:table-cell>
          <table:table-cell office:value-type="float" office:value="133727" table:style-name="ce94">
            <text:p>13372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9" table:style-name="ce93">
            <text:p>14129</text:p>
          </table:table-cell>
          <table:table-cell office:value-type="float" office:value="133728" table:style-name="ce94">
            <text:p>13372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3" table:style-name="ce93">
            <text:p>14123</text:p>
          </table:table-cell>
          <table:table-cell office:value-type="float" office:value="133729" table:style-name="ce94">
            <text:p>13372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313" table:style-name="ce93">
            <text:p>13313</text:p>
          </table:table-cell>
          <table:table-cell office:value-type="float" office:value="133730" table:style-name="ce94">
            <text:p>13373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6240" table:style-name="ce96">
            <text:p><text:s/>46,2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6" table:style-name="ce93">
            <text:p>14126</text:p>
          </table:table-cell>
          <table:table-cell office:value-type="float" office:value="133731" table:style-name="ce94">
            <text:p>13373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7" table:style-name="ce93">
            <text:p>14127</text:p>
          </table:table-cell>
          <table:table-cell office:value-type="float" office:value="133732" table:style-name="ce94">
            <text:p>13373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179" table:style-name="ce93">
            <text:p>13179</text:p>
          </table:table-cell>
          <table:table-cell office:value-type="float" office:value="133733" table:style-name="ce94">
            <text:p>13373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5" table:style-name="ce93">
            <text:p>14125</text:p>
          </table:table-cell>
          <table:table-cell office:value-type="float" office:value="133734" table:style-name="ce94">
            <text:p>13373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4">
          <table:table-cell office:value-type="date" office:date-value="2022-03-28T00:00:00" table:style-name="ce92">
            <text:p>03/28/2022</text:p>
          </table:table-cell>
          <table:table-cell office:value-type="float" office:value="13180" table:style-name="ce93">
            <text:p>13180</text:p>
          </table:table-cell>
          <table:table-cell office:value-type="float" office:value="133735" table:style-name="ce94">
            <text:p>13373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4" table:style-name="ce93">
            <text:p>14124</text:p>
          </table:table-cell>
          <table:table-cell office:value-type="float" office:value="133736" table:style-name="ce94">
            <text:p>13373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8" table:style-name="ce93">
            <text:p>14128</text:p>
          </table:table-cell>
          <table:table-cell office:value-type="float" office:value="133737" table:style-name="ce94">
            <text:p>13373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936" table:style-name="ce96">
            <text:p><text:s/>6,9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300" table:style-name="ce93">
            <text:p>13300</text:p>
          </table:table-cell>
          <table:table-cell office:value-type="float" office:value="133738" table:style-name="ce94">
            <text:p>13373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8" table:style-name="ce96">
            <text:p><text:s/>9,2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0" table:style-name="ce93">
            <text:p>14130</text:p>
          </table:table-cell>
          <table:table-cell office:value-type="float" office:value="133739" table:style-name="ce94">
            <text:p>13373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179" table:style-name="ce93">
            <text:p>13179</text:p>
          </table:table-cell>
          <table:table-cell office:value-type="float" office:value="133740" table:style-name="ce94">
            <text:p>13374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442Y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1" table:style-name="ce93">
            <text:p>14131</text:p>
          </table:table-cell>
          <table:table-cell office:value-type="float" office:value="133741" table:style-name="ce94">
            <text:p>13374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300" table:style-name="ce93">
            <text:p>13300</text:p>
          </table:table-cell>
          <table:table-cell office:value-type="float" office:value="133742" table:style-name="ce94">
            <text:p>13374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872" table:style-name="ce96">
            <text:p><text:s/>13,8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3" table:style-name="ce93">
            <text:p>14133</text:p>
          </table:table-cell>
          <table:table-cell office:value-type="float" office:value="133743" table:style-name="ce94">
            <text:p>13374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44" table:style-name="ce94">
            <text:p>13374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872" table:style-name="ce96">
            <text:p><text:s/>13,8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201" table:style-name="ce93">
            <text:p>14201</text:p>
          </table:table-cell>
          <table:table-cell office:value-type="float" office:value="133745" table:style-name="ce94">
            <text:p>13374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8" table:style-name="ce96">
            <text:p><text:s/>9,2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4" table:style-name="ce93">
            <text:p>14134</text:p>
          </table:table-cell>
          <table:table-cell office:value-type="float" office:value="133746" table:style-name="ce94">
            <text:p>13374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2" table:style-name="ce93">
            <text:p>14132</text:p>
          </table:table-cell>
          <table:table-cell office:value-type="float" office:value="133747" table:style-name="ce94">
            <text:p>13374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202" table:style-name="ce93">
            <text:p>14202</text:p>
          </table:table-cell>
          <table:table-cell office:value-type="float" office:value="133748" table:style-name="ce94">
            <text:p>13374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0" table:style-name="ce96">
            <text:p><text:s/>9,240.00<text:s/></text:p>
          </table:table-cell>
          <table:table-cell table:style-name="ce89"/>
          <table:table-cell table:number-columns-repeated="16376"/>
        </table:table-row>
        <table:table-row table:style-name="ro11">
          <table:table-cell office:value-type="date" office:date-value="2022-03-31T00:00:00" table:style-name="ce92">
            <text:p>03/31/2022</text:p>
          </table:table-cell>
          <table:table-cell office:value-type="float" office:value="13292" table:style-name="ce93">
            <text:p>13292</text:p>
          </table:table-cell>
          <table:table-cell office:value-type="float" office:value="133749" table:style-name="ce94">
            <text:p>13374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 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409" table:style-name="ce96">
            <text:p><text:s/>7,409.00<text:s/></text:p>
          </table:table-cell>
          <table:table-cell table:style-name="ce89"/>
          <table:table-cell table:number-columns-repeated="16376"/>
        </table:table-row>
        <table:table-row table:style-name="ro12">
          <table:table-cell office:value-type="date" office:date-value="2002-03-31T00:00:00" table:style-name="ce92">
            <text:p>03/31/2002</text:p>
          </table:table-cell>
          <table:table-cell office:value-type="float" office:value="14134" table:style-name="ce93">
            <text:p>14134</text:p>
          </table:table-cell>
          <table:table-cell office:value-type="float" office:value="133750" table:style-name="ce94">
            <text:p>13375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9" table:style-name="ce93">
            <text:p>14139</text:p>
          </table:table-cell>
          <table:table-cell office:value-type="float" office:value="133801" table:style-name="ce94">
            <text:p>13380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8" table:style-name="ce93">
            <text:p>14138</text:p>
          </table:table-cell>
          <table:table-cell office:value-type="float" office:value="133802" table:style-name="ce94">
            <text:p>13380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6" table:style-name="ce93">
            <text:p>14136</text:p>
          </table:table-cell>
          <table:table-cell office:value-type="float" office:value="133803" table:style-name="ce94">
            <text:p>13380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7" table:style-name="ce93">
            <text:p>14137</text:p>
          </table:table-cell>
          <table:table-cell office:value-type="float" office:value="133804" table:style-name="ce94">
            <text:p>13380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40" table:style-name="ce93">
            <text:p>14140</text:p>
          </table:table-cell>
          <table:table-cell office:value-type="float" office:value="133805" table:style-name="ce94">
            <text:p>13380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5" table:style-name="ce93">
            <text:p>14135</text:p>
          </table:table-cell>
          <table:table-cell office:value-type="float" office:value="133806" table:style-name="ce94">
            <text:p>13380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8496" table:style-name="ce96">
            <text:p><text:s/>18,4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string" table:style-name="ce93">
            <text:p>12987/86</text:p>
          </table:table-cell>
          <table:table-cell office:value-type="float" office:value="133542" table:style-name="ce94">
            <text:p>13354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Wanjugi Agencies</text:p>
          </table:table-cell>
          <table:table-cell office:value-type="float" office:value="89250" table:style-name="ce99">
            <text:p><text:s/>89,2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2986" table:style-name="ce93">
            <text:p>12986</text:p>
          </table:table-cell>
          <table:table-cell office:value-type="float" office:value="133543" table:style-name="ce94">
            <text:p>133543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Vast Scientific kenya ltd</text:p>
          </table:table-cell>
          <table:table-cell office:value-type="float" office:value="90360" table:style-name="ce99">
            <text:p><text:s/>90,3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2986" table:style-name="ce93">
            <text:p>12986</text:p>
          </table:table-cell>
          <table:table-cell office:value-type="float" office:value="133544" table:style-name="ce94">
            <text:p>133544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Sterile surgical blades</text:p>
          </table:table-cell>
          <table:table-cell office:value-type="string" table:style-name="ce98">
            <text:p>Willcare Enterprises</text:p>
          </table:table-cell>
          <table:table-cell office:value-type="float" office:value="14600" table:style-name="ce99">
            <text:p><text:s/>14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3050" table:style-name="ce93">
            <text:p>13050</text:p>
          </table:table-cell>
          <table:table-cell office:value-type="float" office:value="133545" table:style-name="ce94">
            <text:p>133545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Floor sanding &amp;polishing</text:p>
          </table:table-cell>
          <table:table-cell office:value-type="string" table:style-name="ce98">
            <text:p>Pinpoint hygiene</text:p>
          </table:table-cell>
          <table:table-cell office:value-type="float" office:value="64080" table:style-name="ce99">
            <text:p><text:s/>64,080.00<text:s/></text:p>
          </table:table-cell>
          <table:table-cell office:value-type="float" office:value="64080" table:style-name="ce89">
            <text:p>64,080.00<text:s/></text:p>
          </table:table-cell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1136" table:style-name="ce93">
            <text:p>11136</text:p>
          </table:table-cell>
          <table:table-cell office:value-type="float" office:value="133546" table:style-name="ce94">
            <text:p>133546</text:p>
          </table:table-cell>
          <table:table-cell office:value-type="string" table:style-name="ce75">
            <text:p>Administration/PR</text:p>
          </table:table-cell>
          <table:table-cell office:value-type="string" table:style-name="ce97">
            <text:p>Printing directors business cards</text:p>
          </table:table-cell>
          <table:table-cell office:value-type="string" table:style-name="ce98">
            <text:p>Herlifax Printers<text:s/></text:p>
          </table:table-cell>
          <table:table-cell office:value-type="float" office:value="250000" table:style-name="ce99">
            <text:p><text:s/>250,000.00<text:s/></text:p>
          </table:table-cell>
          <table:table-cell office:value-type="float" office:value="250000" table:style-name="ce89">
            <text:p>250,000.00<text:s/></text:p>
          </table:table-cell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11035" table:style-name="ce93">
            <text:p>11035</text:p>
          </table:table-cell>
          <table:table-cell office:value-type="float" office:value="133547" table:style-name="ce94">
            <text:p>13354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Chandaria industries</text:p>
          </table:table-cell>
          <table:table-cell office:value-type="float" office:value="110440" table:style-name="ce99">
            <text:p><text:s/>110,440.00<text:s/></text:p>
          </table:table-cell>
          <table:table-cell office:value-type="float" office:value="110440" table:style-name="ce89">
            <text:p>110,440.00<text:s/></text:p>
          </table:table-cell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12603" table:style-name="ce93">
            <text:p>12603</text:p>
          </table:table-cell>
          <table:table-cell office:value-type="float" office:value="133548" table:style-name="ce94">
            <text:p>133548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Desktop computer</text:p>
          </table:table-cell>
          <table:table-cell office:value-type="string" table:style-name="ce98">
            <text:p>Newaki prime ltd</text:p>
          </table:table-cell>
          <table:table-cell office:value-type="float" office:value="197500" table:style-name="ce99">
            <text:p><text:s/>197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3569" table:style-name="ce93">
            <text:p>3569</text:p>
          </table:table-cell>
          <table:table-cell office:value-type="float" office:value="133549" table:style-name="ce94">
            <text:p>133549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Catridges</text:p>
          </table:table-cell>
          <table:table-cell office:value-type="string" table:style-name="ce98">
            <text:p>Kenya Toners ink supplies</text:p>
          </table:table-cell>
          <table:table-cell office:value-type="float" office:value="61340" table:style-name="ce99">
            <text:p><text:s/>61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3254" table:style-name="ce93">
            <text:p>13254</text:p>
          </table:table-cell>
          <table:table-cell office:value-type="float" office:value="133550" table:style-name="ce94">
            <text:p>133550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Histopaque</text:p>
          </table:table-cell>
          <table:table-cell office:value-type="string" table:style-name="ce98">
            <text:p>Skytech Africa supplies</text:p>
          </table:table-cell>
          <table:table-cell office:value-type="float" office:value="365000" table:style-name="ce99">
            <text:p><text:s/>365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2244" table:style-name="ce93">
            <text:p>12244</text:p>
          </table:table-cell>
          <table:table-cell office:value-type="float" office:value="133651" table:style-name="ce94">
            <text:p>13365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Vast Scientific kenya ltd</text:p>
          </table:table-cell>
          <table:table-cell office:value-type="float" office:value="38500" table:style-name="ce99">
            <text:p><text:s/>38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2244" table:style-name="ce93">
            <text:p>12244</text:p>
          </table:table-cell>
          <table:table-cell office:value-type="float" office:value="133652" table:style-name="ce94">
            <text:p>13365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Non sterile tips</text:p>
          </table:table-cell>
          <table:table-cell office:value-type="string" table:style-name="ce98">
            <text:p>Wanjugi Agencies</text:p>
          </table:table-cell>
          <table:table-cell office:value-type="float" office:value="4500" table:style-name="ce99">
            <text:p><text:s/>4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1744" table:style-name="ce93">
            <text:p>11744</text:p>
          </table:table-cell>
          <table:table-cell office:value-type="float" office:value="133653" table:style-name="ce94">
            <text:p>133653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virus transport media collection kit</text:p>
          </table:table-cell>
          <table:table-cell office:value-type="string" table:style-name="ce98">
            <text:p>Medlab scientific co.ltd</text:p>
          </table:table-cell>
          <table:table-cell office:value-type="float" office:value="108000" table:style-name="ce99">
            <text:p><text:s/>108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3268" table:style-name="ce93">
            <text:p>13268</text:p>
          </table:table-cell>
          <table:table-cell office:value-type="float" office:value="133654" table:style-name="ce94">
            <text:p>133654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equipment maintainance</text:p>
          </table:table-cell>
          <table:table-cell office:value-type="string" table:style-name="ce98">
            <text:p>sciencescope limited</text:p>
          </table:table-cell>
          <table:table-cell office:value-type="float" office:value="26500" table:style-name="ce99">
            <text:p><text:s/>26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11-18T00:00:00" table:style-name="ce92">
            <text:p>11/18/2022</text:p>
          </table:table-cell>
          <table:table-cell office:value-type="float" office:value="11741" table:style-name="ce93">
            <text:p>11741</text:p>
          </table:table-cell>
          <table:table-cell office:value-type="float" office:value="133655" table:style-name="ce94">
            <text:p>13365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covid -19 sampling kit</text:p>
          </table:table-cell>
          <table:table-cell office:value-type="string" table:style-name="ce98">
            <text:p>Vast Scientific kenya ltd</text:p>
          </table:table-cell>
          <table:table-cell office:value-type="float" office:value="36000" table:style-name="ce99">
            <text:p><text:s/>36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1683" table:style-name="ce93">
            <text:p>11683</text:p>
          </table:table-cell>
          <table:table-cell office:value-type="float" office:value="133656" table:style-name="ce94">
            <text:p>133656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d biohazard bags</text:p>
          </table:table-cell>
          <table:table-cell office:value-type="string" table:style-name="ce98">
            <text:p>Vast Scientific kenya ltd</text:p>
          </table:table-cell>
          <table:table-cell office:value-type="float" office:value="3800" table:style-name="ce99">
            <text:p><text:s/>3,800.00<text:s/></text:p>
          </table:table-cell>
          <table:table-cell office:value-type="float" office:value="3800" table:style-name="ce89">
            <text:p>3,800.00<text:s/></text:p>
          </table:table-cell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3951" table:style-name="ce93">
            <text:p>13951</text:p>
          </table:table-cell>
          <table:table-cell office:value-type="float" office:value="133657" table:style-name="ce94">
            <text:p>133657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Hp Prodesk 400 computer</text:p>
          </table:table-cell>
          <table:table-cell office:value-type="string" table:style-name="ce98">
            <text:p>Kenya Toners ink supplies</text:p>
          </table:table-cell>
          <table:table-cell office:value-type="float" office:value="122193" table:style-name="ce99">
            <text:p><text:s/>122,193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37" table:style-name="ce93">
            <text:p>11137</text:p>
          </table:table-cell>
          <table:table-cell office:value-type="float" office:value="133659" table:style-name="ce94">
            <text:p>133659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printing of A2 calendars</text:p>
          </table:table-cell>
          <table:table-cell office:value-type="string" table:style-name="ce98">
            <text:p>Hills Converters</text:p>
          </table:table-cell>
          <table:table-cell office:value-type="float" office:value="84440" table:style-name="ce99">
            <text:p><text:s/>84,440.00<text:s/></text:p>
          </table:table-cell>
          <table:table-cell office:value-type="float" office:value="84440" table:style-name="ce89">
            <text:p>84,440.00<text:s/></text:p>
          </table:table-cell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37" table:style-name="ce93">
            <text:p>11137</text:p>
          </table:table-cell>
          <table:table-cell office:value-type="float" office:value="133660" table:style-name="ce94">
            <text:p>133660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Diaries</text:p>
          </table:table-cell>
          <table:table-cell office:value-type="string" table:style-name="ce98">
            <text:p>Harlifax printers<text:s/></text:p>
          </table:table-cell>
          <table:table-cell office:value-type="float" office:value="100500" table:style-name="ce99">
            <text:p><text:s/>100,500.00<text:s/></text:p>
          </table:table-cell>
          <table:table-cell office:value-type="float" office:value="100500" table:style-name="ce89">
            <text:p>100,500.00<text:s/></text:p>
          </table:table-cell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40" table:style-name="ce93">
            <text:p>11140</text:p>
          </table:table-cell>
          <table:table-cell office:value-type="float" office:value="133661" table:style-name="ce94">
            <text:p>133661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A3 folded brochures</text:p>
          </table:table-cell>
          <table:table-cell office:value-type="string" table:style-name="ce98">
            <text:p>Floging East Africa</text:p>
          </table:table-cell>
          <table:table-cell office:value-type="float" office:value="41600" table:style-name="ce99">
            <text:p><text:s/>41,600.00<text:s/></text:p>
          </table:table-cell>
          <table:table-cell office:value-type="float" office:value="41600" table:style-name="ce89">
            <text:p>41,600.00<text:s/></text:p>
          </table:table-cell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2255" table:style-name="ce93">
            <text:p>12255</text:p>
          </table:table-cell>
          <table:table-cell office:value-type="float" office:value="133662" table:style-name="ce94">
            <text:p>133662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Ethanol and nitrile gloves</text:p>
          </table:table-cell>
          <table:table-cell office:value-type="string" table:style-name="ce98">
            <text:p>Skytech Africa supplies</text:p>
          </table:table-cell>
          <table:table-cell office:value-type="float" office:value="55500" table:style-name="ce99">
            <text:p><text:s/>55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3281" table:style-name="ce93">
            <text:p>13281</text:p>
          </table:table-cell>
          <table:table-cell office:value-type="float" office:value="133664" table:style-name="ce94">
            <text:p>133664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filter tips</text:p>
          </table:table-cell>
          <table:table-cell office:value-type="string" table:style-name="ce98">
            <text:p>Vast Scientific kenya ltd</text:p>
          </table:table-cell>
          <table:table-cell office:value-type="float" office:value="42000" table:style-name="ce99">
            <text:p><text:s/>42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039" table:style-name="ce93">
            <text:p>11039</text:p>
          </table:table-cell>
          <table:table-cell office:value-type="float" office:value="133665" table:style-name="ce94">
            <text:p>133665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Branded biros and envelopes</text:p>
          </table:table-cell>
          <table:table-cell office:value-type="string" table:style-name="ce98">
            <text:p>Pinnacore Kenya Ltd</text:p>
          </table:table-cell>
          <table:table-cell office:value-type="float" office:value="57000" table:style-name="ce99">
            <text:p><text:s/>57,000.00<text:s/></text:p>
          </table:table-cell>
          <table:table-cell office:value-type="float" office:value="57000" table:style-name="ce89">
            <text:p>57,000.00<text:s/></text:p>
          </table:table-cell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3717" table:style-name="ce93">
            <text:p>13717</text:p>
          </table:table-cell>
          <table:table-cell office:value-type="float" office:value="133666" table:style-name="ce94">
            <text:p>133666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Generator Repair</text:p>
          </table:table-cell>
          <table:table-cell office:value-type="string" table:style-name="ce98">
            <text:p>Blackwood Hodge ltd</text:p>
          </table:table-cell>
          <table:table-cell office:value-type="float" office:value="48720" table:style-name="ce99">
            <text:p><text:s/>48,720.00<text:s/></text:p>
          </table:table-cell>
          <table:table-cell office:value-type="float" office:value="48720" table:style-name="ce89">
            <text:p>48,7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036" table:style-name="ce93">
            <text:p>11036</text:p>
          </table:table-cell>
          <table:table-cell office:value-type="float" office:value="133667" table:style-name="ce94">
            <text:p>13366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Zippytech Agency</text:p>
          </table:table-cell>
          <table:table-cell office:value-type="float" office:value="17850" table:style-name="ce99">
            <text:p><text:s/>17,8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2605" table:style-name="ce93">
            <text:p>12605</text:p>
          </table:table-cell>
          <table:table-cell office:value-type="float" office:value="133668" table:style-name="ce94">
            <text:p>133668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Pamtop Supplier</text:p>
          </table:table-cell>
          <table:table-cell office:value-type="float" office:value="37060" table:style-name="ce99">
            <text:p><text:s/>37,0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01" table:style-name="ce93">
            <text:p>14001</text:p>
          </table:table-cell>
          <table:table-cell office:value-type="float" office:value="133671" table:style-name="ce94">
            <text:p>13367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Gas Refill</text:p>
          </table:table-cell>
          <table:table-cell office:value-type="string" table:style-name="ce98">
            <text:p>BOC Kenya ltd</text:p>
          </table:table-cell>
          <table:table-cell office:value-type="float" office:value="37220" table:style-name="ce99">
            <text:p><text:s/>37,220.00<text:s/></text:p>
          </table:table-cell>
          <table:table-cell office:value-type="float" office:value="37220" table:style-name="ce89">
            <text:p>37,2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2995" table:style-name="ce93">
            <text:p>12995</text:p>
          </table:table-cell>
          <table:table-cell office:value-type="float" office:value="133672" table:style-name="ce94">
            <text:p>13367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reagents</text:p>
          </table:table-cell>
          <table:table-cell office:value-type="string" table:style-name="ce98">
            <text:p>Life Watchers supplies ltd</text:p>
          </table:table-cell>
          <table:table-cell office:value-type="float" office:value="144600" table:style-name="ce99">
            <text:p><text:s/>144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3" table:style-name="ce93">
            <text:p>14053</text:p>
          </table:table-cell>
          <table:table-cell office:value-type="float" office:value="133673" table:style-name="ce94">
            <text:p>133673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Skytech Africa supplies</text:p>
          </table:table-cell>
          <table:table-cell office:value-type="float" office:value="668000" table:style-name="ce99">
            <text:p><text:s/>668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4" table:style-name="ce93">
            <text:p>14054</text:p>
          </table:table-cell>
          <table:table-cell office:value-type="float" office:value="133674" table:style-name="ce94">
            <text:p>133674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Africa Biosystem ltd</text:p>
          </table:table-cell>
          <table:table-cell office:value-type="float" office:value="286610" table:style-name="ce99">
            <text:p><text:s/>286,61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4" table:style-name="ce93">
            <text:p>14054</text:p>
          </table:table-cell>
          <table:table-cell office:value-type="float" office:value="133675" table:style-name="ce94">
            <text:p>13367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Swabs for bat sample collection</text:p>
          </table:table-cell>
          <table:table-cell office:value-type="string" table:style-name="ce98">
            <text:p>Willcare Enterprises</text:p>
          </table:table-cell>
          <table:table-cell office:value-type="float" office:value="20020" table:style-name="ce99">
            <text:p><text:s/>20,02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4T00:00:00" table:style-name="ce92">
            <text:p>02/04/2022</text:p>
          </table:table-cell>
          <table:table-cell office:value-type="float" office:value="13893" table:style-name="ce93">
            <text:p>13893</text:p>
          </table:table-cell>
          <table:table-cell office:value-type="float" office:value="133676" table:style-name="ce94">
            <text:p>133676</text:p>
          </table:table-cell>
          <table:table-cell office:value-type="string" table:style-name="ce75">
            <text:p>Transport</text:p>
          </table:table-cell>
          <table:table-cell office:value-type="string" table:style-name="ce97">
            <text:p>Vehicle Tyres</text:p>
          </table:table-cell>
          <table:table-cell office:value-type="string" table:style-name="ce98">
            <text:p>Chamwa Motors ltd</text:p>
          </table:table-cell>
          <table:table-cell office:value-type="float" office:value="187000" table:style-name="ce99">
            <text:p><text:s/>187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907" table:style-name="ce93">
            <text:p>13907</text:p>
          </table:table-cell>
          <table:table-cell office:value-type="float" office:value="133677" table:style-name="ce94">
            <text:p>133677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Ethanol GPR</text:p>
          </table:table-cell>
          <table:table-cell office:value-type="string" table:style-name="ce98">
            <text:p>Willcare Enterprises</text:p>
          </table:table-cell>
          <table:table-cell office:value-type="float" office:value="57600" table:style-name="ce99">
            <text:p><text:s/>57,600.00<text:s/></text:p>
          </table:table-cell>
          <table:table-cell office:value-type="float" office:value="57600" table:style-name="ce89">
            <text:p>57,6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981" table:style-name="ce93">
            <text:p>13981</text:p>
          </table:table-cell>
          <table:table-cell office:value-type="float" office:value="133678" table:style-name="ce94">
            <text:p>133678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Danbecos Enterprises</text:p>
          </table:table-cell>
          <table:table-cell office:value-type="float" office:value="43868" table:style-name="ce99">
            <text:p><text:s/>43,868.00<text:s/></text:p>
          </table:table-cell>
          <table:table-cell office:value-type="float" office:value="43868" table:style-name="ce89">
            <text:p>43,868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3904/78</text:p>
          </table:table-cell>
          <table:table-cell office:value-type="float" office:value="133679" table:style-name="ce94">
            <text:p>133679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Johand General supplies</text:p>
          </table:table-cell>
          <table:table-cell office:value-type="float" office:value="73689" table:style-name="ce99">
            <text:p><text:s/>73,689.00<text:s/></text:p>
          </table:table-cell>
          <table:table-cell office:value-type="float" office:value="73689" table:style-name="ce89">
            <text:p>73,689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738" table:style-name="ce93">
            <text:p>13738</text:p>
          </table:table-cell>
          <table:table-cell office:value-type="float" office:value="133680" table:style-name="ce94">
            <text:p>13368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Johand General supplies</text:p>
          </table:table-cell>
          <table:table-cell office:value-type="float" office:value="37660" table:style-name="ce99">
            <text:p><text:s/>37,6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69" table:style-name="ce93">
            <text:p>13269</text:p>
          </table:table-cell>
          <table:table-cell office:value-type="float" office:value="133681" table:style-name="ce94">
            <text:p>133681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Liquid nitrogen gas</text:p>
          </table:table-cell>
          <table:table-cell office:value-type="string" table:style-name="ce98">
            <text:p>Kenya Animal Genetic</text:p>
          </table:table-cell>
          <table:table-cell office:value-type="float" office:value="29000" table:style-name="ce99">
            <text:p><text:s/>29,000.00<text:s/></text:p>
          </table:table-cell>
          <table:table-cell office:value-type="float" office:value="29000" table:style-name="ce89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73" table:style-name="ce93">
            <text:p>13273</text:p>
          </table:table-cell>
          <table:table-cell office:value-type="float" office:value="133682" table:style-name="ce94">
            <text:p>133682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Mice pencils</text:p>
          </table:table-cell>
          <table:table-cell office:value-type="string" table:style-name="ce98">
            <text:p>Unga farm care ltd</text:p>
          </table:table-cell>
          <table:table-cell office:value-type="float" office:value="14075" table:style-name="ce99">
            <text:p><text:s/>14,075.00<text:s/></text:p>
          </table:table-cell>
          <table:table-cell office:value-type="float" office:value="14075" table:style-name="ce89">
            <text:p>14,075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682" table:style-name="ce93">
            <text:p>11682</text:p>
          </table:table-cell>
          <table:table-cell office:value-type="float" office:value="133683" table:style-name="ce94">
            <text:p>133683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pair of refrigerators</text:p>
          </table:table-cell>
          <table:table-cell office:value-type="string" table:style-name="ce98">
            <text:p>Arclink Enterprises</text:p>
          </table:table-cell>
          <table:table-cell office:value-type="float" office:value="14500" table:style-name="ce99">
            <text:p><text:s/>14,500.00<text:s/></text:p>
          </table:table-cell>
          <table:table-cell office:value-type="float" office:value="14500" table:style-name="ce89">
            <text:p>14,5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5" table:style-name="ce93">
            <text:p>14055</text:p>
          </table:table-cell>
          <table:table-cell office:value-type="float" office:value="133684" table:style-name="ce94">
            <text:p>133684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<text:s/>Filter tips and surgical masks</text:p>
          </table:table-cell>
          <table:table-cell office:value-type="string" table:style-name="ce98">
            <text:p>Vast Scientific kenya ltd</text:p>
          </table:table-cell>
          <table:table-cell office:value-type="float" office:value="191900" table:style-name="ce99">
            <text:p><text:s/>191,9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5" table:style-name="ce93">
            <text:p>14055</text:p>
          </table:table-cell>
          <table:table-cell office:value-type="float" office:value="133685" table:style-name="ce94">
            <text:p>13368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Nittrile gloves and eppendorf tubes</text:p>
          </table:table-cell>
          <table:table-cell office:value-type="string" table:style-name="ce98">
            <text:p>Willcare Enterprises</text:p>
          </table:table-cell>
          <table:table-cell office:value-type="float" office:value="76100" table:style-name="ce99">
            <text:p><text:s/>76,1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746" table:style-name="ce93">
            <text:p>11746</text:p>
          </table:table-cell>
          <table:table-cell office:value-type="float" office:value="133686" table:style-name="ce94">
            <text:p>133686</text:p>
          </table:table-cell>
          <table:table-cell office:value-type="string" table:style-name="ce75">
            <text:p>covid 19 testing</text:p>
          </table:table-cell>
          <table:table-cell office:value-type="string" table:style-name="ce97">
            <text:p>Covid 19 sample collection kit</text:p>
          </table:table-cell>
          <table:table-cell office:value-type="string" table:style-name="ce98">
            <text:p>Medlab scientific co.ltd</text:p>
          </table:table-cell>
          <table:table-cell office:value-type="float" office:value="36000" table:style-name="ce99">
            <text:p><text:s/>36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10" table:style-name="ce93">
            <text:p>14010</text:p>
          </table:table-cell>
          <table:table-cell office:value-type="float" office:value="133687" table:style-name="ce94">
            <text:p>133687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Smatgen International ltd</text:p>
          </table:table-cell>
          <table:table-cell office:value-type="float" office:value="60720" table:style-name="ce99">
            <text:p><text:s/>60,720.00<text:s/></text:p>
          </table:table-cell>
          <table:table-cell office:value-type="float" office:value="60720" table:style-name="ce89">
            <text:p>60,7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10" table:style-name="ce93">
            <text:p>14010</text:p>
          </table:table-cell>
          <table:table-cell office:value-type="float" office:value="133688" table:style-name="ce94">
            <text:p>133688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Midanda Enterprises</text:p>
          </table:table-cell>
          <table:table-cell office:value-type="float" office:value="72460" table:style-name="ce99">
            <text:p><text:s/>72,460.00<text:s/></text:p>
          </table:table-cell>
          <table:table-cell office:value-type="float" office:value="72460" table:style-name="ce89">
            <text:p>72,46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1037/38</text:p>
          </table:table-cell>
          <table:table-cell office:value-type="float" office:value="133689" table:style-name="ce94">
            <text:p>133689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Smatgen International ltd</text:p>
          </table:table-cell>
          <table:table-cell office:value-type="float" office:value="215560" table:style-name="ce99">
            <text:p><text:s/>215,560.00<text:s/></text:p>
          </table:table-cell>
          <table:table-cell office:value-type="float" office:value="215560" table:style-name="ce89">
            <text:p>215,56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1038/37</text:p>
          </table:table-cell>
          <table:table-cell office:value-type="float" office:value="133690" table:style-name="ce94">
            <text:p>133690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Midanda Enterprises</text:p>
          </table:table-cell>
          <table:table-cell office:value-type="float" office:value="146820" table:style-name="ce99">
            <text:p><text:s/>146,820.00<text:s/></text:p>
          </table:table-cell>
          <table:table-cell office:value-type="float" office:value="146820" table:style-name="ce89">
            <text:p>146,82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float" office:value="14002" table:style-name="ce93">
            <text:p>14002</text:p>
          </table:table-cell>
          <table:table-cell office:value-type="float" office:value="133691" table:style-name="ce94">
            <text:p>13369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Refil of co2 gas</text:p>
          </table:table-cell>
          <table:table-cell office:value-type="string" table:style-name="ce98">
            <text:p>Carbacid CO2 limited</text:p>
          </table:table-cell>
          <table:table-cell office:value-type="float" office:value="1800" table:style-name="ce99">
            <text:p><text:s/>1,800.00<text:s/></text:p>
          </table:table-cell>
          <table:table-cell office:value-type="float" office:value="1800" table:style-name="ce89">
            <text:p>1,80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float" office:value="13272" table:style-name="ce93">
            <text:p>13272</text:p>
          </table:table-cell>
          <table:table-cell office:value-type="float" office:value="133692" table:style-name="ce94">
            <text:p>133692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CO2 Regulator</text:p>
          </table:table-cell>
          <table:table-cell office:value-type="string" table:style-name="ce98">
            <text:p>Carbacid CO2 limited</text:p>
          </table:table-cell>
          <table:table-cell office:value-type="float" office:value="17600" table:style-name="ce99">
            <text:p><text:s/>17,600.00<text:s/></text:p>
          </table:table-cell>
          <table:table-cell office:value-type="float" office:value="17600" table:style-name="ce89">
            <text:p>17,60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string" table:style-name="ce93">
            <text:p>13937/38</text:p>
          </table:table-cell>
          <table:table-cell office:value-type="float" office:value="133693" table:style-name="ce94">
            <text:p>133693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Sanol Holding</text:p>
          </table:table-cell>
          <table:table-cell office:value-type="float" office:value="167760" table:style-name="ce99">
            <text:p><text:s/>167,760.00<text:s/></text:p>
          </table:table-cell>
          <table:table-cell office:value-type="float" office:value="167760" table:style-name="ce89">
            <text:p>167,760.00<text:s/>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015" table:style-name="ce93">
            <text:p>14015</text:p>
          </table:table-cell>
          <table:table-cell office:value-type="float" office:value="133696" table:style-name="ce94">
            <text:p>133696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onkey cubes</text:p>
          </table:table-cell>
          <table:table-cell office:value-type="string" table:style-name="ce98">
            <text:p>Unga farm care ltd</text:p>
          </table:table-cell>
          <table:table-cell office:value-type="float" office:value="492337" table:style-name="ce99">
            <text:p><text:s/>492,337.00<text:s/></text:p>
          </table:table-cell>
          <table:table-cell office:value-type="float" office:value="492337" table:style-name="ce89">
            <text:p>492,337.00<text:s/>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2606" table:style-name="ce93">
            <text:p>12606</text:p>
          </table:table-cell>
          <table:table-cell office:value-type="float" office:value="133697" table:style-name="ce94">
            <text:p>133697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Kaswii Investments</text:p>
          </table:table-cell>
          <table:table-cell office:value-type="float" office:value="24960" table:style-name="ce99">
            <text:p><text:s/>24,9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2471" table:style-name="ce93">
            <text:p>12471</text:p>
          </table:table-cell>
          <table:table-cell office:value-type="float" office:value="133698" table:style-name="ce94">
            <text:p>133698</text:p>
          </table:table-cell>
          <table:table-cell office:value-type="string" table:style-name="ce75">
            <text:p>Directors office</text:p>
          </table:table-cell>
          <table:table-cell office:value-type="string" table:style-name="ce97">
            <text:p>catridges</text:p>
          </table:table-cell>
          <table:table-cell office:value-type="string" table:style-name="ce98">
            <text:p>Cechum Enterprises</text:p>
          </table:table-cell>
          <table:table-cell office:value-type="float" office:value="54150" table:style-name="ce99">
            <text:p><text:s/>54,1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3722" table:style-name="ce93">
            <text:p>13722</text:p>
          </table:table-cell>
          <table:table-cell office:value-type="float" office:value="133699" table:style-name="ce94">
            <text:p>133699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Repair of laundry machine</text:p>
          </table:table-cell>
          <table:table-cell office:value-type="string" table:style-name="ce98">
            <text:p>Elecrical and General</text:p>
          </table:table-cell>
          <table:table-cell office:value-type="float" office:value="29592" table:style-name="ce99">
            <text:p><text:s/>29,592.00<text:s/></text:p>
          </table:table-cell>
          <table:table-cell office:value-type="float" office:value="29592" table:style-name="ce89">
            <text:p>29,592.00<text:s/></text:p>
          </table:table-cell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4056" table:style-name="ce93">
            <text:p>14056</text:p>
          </table:table-cell>
          <table:table-cell office:value-type="float" office:value="133751" table:style-name="ce94">
            <text:p>133751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2-mectaptoethanol sigma</text:p>
          </table:table-cell>
          <table:table-cell office:value-type="string" table:style-name="ce98">
            <text:p>Kobian Kenya ltd</text:p>
          </table:table-cell>
          <table:table-cell office:value-type="float" office:value="9860" table:style-name="ce99">
            <text:p><text:s/>9,8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2" table:style-name="ce94">
            <text:p>133752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filter tips</text:p>
          </table:table-cell>
          <table:table-cell office:value-type="string" table:style-name="ce98">
            <text:p>Vast Scientific kenya ltd</text:p>
          </table:table-cell>
          <table:table-cell office:value-type="float" office:value="62450" table:style-name="ce99">
            <text:p><text:s/>62,4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3" table:style-name="ce94">
            <text:p>133753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Nitrile Gloves</text:p>
          </table:table-cell>
          <table:table-cell office:value-type="string" table:style-name="ce98">
            <text:p>Willcare Enterprises</text:p>
          </table:table-cell>
          <table:table-cell office:value-type="float" office:value="32600" table:style-name="ce99">
            <text:p><text:s/>32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4" table:style-name="ce94">
            <text:p>133754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Agnose powder</text:p>
          </table:table-cell>
          <table:table-cell office:value-type="string" table:style-name="ce98">
            <text:p>Inqaba Biotec East Africa</text:p>
          </table:table-cell>
          <table:table-cell office:value-type="float" office:value="11123" table:style-name="ce99">
            <text:p><text:s/>11,123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7986" table:style-name="ce93">
            <text:p>7986</text:p>
          </table:table-cell>
          <table:table-cell office:value-type="float" office:value="133756" table:style-name="ce94">
            <text:p>133756</text:p>
          </table:table-cell>
          <table:table-cell office:value-type="string" table:style-name="ce75">
            <text:p>COR</text:p>
          </table:table-cell>
          <table:table-cell office:value-type="string" table:style-name="ce97">
            <text:p>equipment maintainance</text:p>
          </table:table-cell>
          <table:table-cell office:value-type="string" table:style-name="ce98">
            <text:p>Linear Diagnostic E.A</text:p>
          </table:table-cell>
          <table:table-cell office:value-type="float" office:value="62000" table:style-name="ce99">
            <text:p><text:s/>62,000.00<text:s/></text:p>
          </table:table-cell>
          <table:table-cell office:value-type="float" office:value="62000" table:style-name="ce89">
            <text:p>62,000.00<text:s/></text:p>
          </table:table-cell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string" table:style-name="ce93">
            <text:p>11040/41</text:p>
          </table:table-cell>
          <table:table-cell office:value-type="float" office:value="133757" table:style-name="ce94">
            <text:p>13375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Stationeries</text:p>
          </table:table-cell>
          <table:table-cell office:value-type="string" table:style-name="ce98">
            <text:p>Beutsal International</text:p>
          </table:table-cell>
          <table:table-cell office:value-type="float" office:value="102227" table:style-name="ce99">
            <text:p><text:s/>102,227.00<text:s/></text:p>
          </table:table-cell>
          <table:table-cell office:value-type="float" office:value="102227" table:style-name="ce89">
            <text:p>102,227.00<text:s/></text:p>
          </table:table-cell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string" table:style-name="ce93">
            <text:p>11040/41</text:p>
          </table:table-cell>
          <table:table-cell office:value-type="float" office:value="133758" table:style-name="ce94">
            <text:p>133758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Stationeries</text:p>
          </table:table-cell>
          <table:table-cell office:value-type="string" table:style-name="ce98">
            <text:p>Maxi print and colour</text:p>
          </table:table-cell>
          <table:table-cell office:value-type="float" office:value="28464" table:style-name="ce99">
            <text:p><text:s/>28,464.00<text:s/></text:p>
          </table:table-cell>
          <table:table-cell office:value-type="float" office:value="28464" table:style-name="ce89">
            <text:p>28,464.00<text:s/>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3285" table:style-name="ce93">
            <text:p>13285</text:p>
          </table:table-cell>
          <table:table-cell office:value-type="float" office:value="133759" table:style-name="ce94">
            <text:p>133759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Liquid nitrogen gas</text:p>
          </table:table-cell>
          <table:table-cell office:value-type="string" table:style-name="ce98">
            <text:p>Kenya Animal Genetic</text:p>
          </table:table-cell>
          <table:table-cell office:value-type="float" office:value="29000" table:style-name="ce99">
            <text:p><text:s/>29,000.00<text:s/></text:p>
          </table:table-cell>
          <table:table-cell office:value-type="float" office:value="29000" table:style-name="ce89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02T00:00:00" table:style-name="ce92">
            <text:p>03/02/2022</text:p>
          </table:table-cell>
          <table:table-cell office:value-type="float" office:value="13308" table:style-name="ce93">
            <text:p>13308</text:p>
          </table:table-cell>
          <table:table-cell office:value-type="float" office:value="133760" table:style-name="ce94">
            <text:p>13376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Sanol Holding</text:p>
          </table:table-cell>
          <table:table-cell office:value-type="float" office:value="7260" table:style-name="ce99">
            <text:p><text:s/>7,260.00<text:s/></text:p>
          </table:table-cell>
          <table:table-cell office:value-type="float" office:value="7260" table:style-name="ce89">
            <text:p>7,260.00<text:s/></text:p>
          </table:table-cell>
          <table:table-cell table:number-columns-repeated="16376"/>
        </table:table-row>
        <table:table-row table:style-name="ro1">
          <table:table-cell office:value-type="date" office:date-value="2022-03-02T00:00:00" table:style-name="ce92">
            <text:p>03/02/2022</text:p>
          </table:table-cell>
          <table:table-cell office:value-type="float" office:value="13307" table:style-name="ce93">
            <text:p>13307</text:p>
          </table:table-cell>
          <table:table-cell office:value-type="float" office:value="133762" table:style-name="ce94">
            <text:p>133762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Riam General supplies</text:p>
          </table:table-cell>
          <table:table-cell office:value-type="float" office:value="23640" table:style-name="ce99">
            <text:p><text:s/>23,640.00<text:s/></text:p>
          </table:table-cell>
          <table:table-cell office:value-type="float" office:value="23640" table:style-name="ce89">
            <text:p>23,640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float" office:value="14019" table:style-name="ce93">
            <text:p>14019</text:p>
          </table:table-cell>
          <table:table-cell office:value-type="float" office:value="133768" table:style-name="ce94">
            <text:p>133768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chemicals and equipments</text:p>
          </table:table-cell>
          <table:table-cell office:value-type="string" table:style-name="ce98">
            <text:p>Kobian Kenya ltd</text:p>
          </table:table-cell>
          <table:table-cell office:value-type="float" office:value="27840" table:style-name="ce99">
            <text:p><text:s/>27,8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2T00:00:00" table:style-name="ce92">
            <text:p>03/22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1" table:style-name="ce94">
            <text:p>133771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Exosap-IT 100RAN</text:p>
          </table:table-cell>
          <table:table-cell office:value-type="string" table:style-name="ce98">
            <text:p>Africa Biosystem ltd</text:p>
          </table:table-cell>
          <table:table-cell office:value-type="float" office:value="20742" table:style-name="ce99">
            <text:p><text:s/>20,74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2T00:00:00" table:style-name="ce92">
            <text:p>03/22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2" table:style-name="ce94">
            <text:p>133772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Lab chemicals</text:p>
          </table:table-cell>
          <table:table-cell office:value-type="string" table:style-name="ce98">
            <text:p>Anatech Africa ltd</text:p>
          </table:table-cell>
          <table:table-cell office:value-type="float" office:value="88066" table:style-name="ce99">
            <text:p><text:s/>88,06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3" table:style-name="ce94">
            <text:p>133773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Bst warmstat DNA Polymerase</text:p>
          </table:table-cell>
          <table:table-cell office:value-type="string" table:style-name="ce98">
            <text:p>Inqaba Biotec East Africa</text:p>
          </table:table-cell>
          <table:table-cell office:value-type="float" office:value="29722" table:style-name="ce99">
            <text:p><text:s/>29,72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4122" table:style-name="ce93">
            <text:p>14122</text:p>
          </table:table-cell>
          <table:table-cell office:value-type="float" office:value="133774" table:style-name="ce94">
            <text:p>133774</text:p>
          </table:table-cell>
          <table:table-cell office:value-type="string" table:style-name="ce75">
            <text:p>Transport</text:p>
          </table:table-cell>
          <table:table-cell office:value-type="string" table:style-name="ce97">
            <text:p>tyres for kbl 126g</text:p>
          </table:table-cell>
          <table:table-cell office:value-type="string" table:style-name="ce98">
            <text:p>Mustral general</text:p>
          </table:table-cell>
          <table:table-cell office:value-type="float" office:value="64000" table:style-name="ce99">
            <text:p><text:s/>64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7989" table:style-name="ce93">
            <text:p>7989</text:p>
          </table:table-cell>
          <table:table-cell office:value-type="float" office:value="133775" table:style-name="ce94">
            <text:p>133775</text:p>
          </table:table-cell>
          <table:table-cell office:value-type="string" table:style-name="ce75">
            <text:p>COR/kepra project</text:p>
          </table:table-cell>
          <table:table-cell office:value-type="string" table:style-name="ce97">
            <text:p>office furniture</text:p>
          </table:table-cell>
          <table:table-cell office:value-type="string" table:style-name="ce98">
            <text:p>Mt.kenya furnitures</text:p>
          </table:table-cell>
          <table:table-cell office:value-type="float" office:value="310000" table:style-name="ce99">
            <text:p><text:s/>310,000.00<text:s/></text:p>
          </table:table-cell>
          <table:table-cell office:value-type="float" office:value="310000" table:style-name="ce89">
            <text:p>310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2247" table:style-name="ce93">
            <text:p>12247</text:p>
          </table:table-cell>
          <table:table-cell office:value-type="float" office:value="133776" table:style-name="ce94">
            <text:p>133776</text:p>
          </table:table-cell>
          <table:table-cell office:value-type="string" table:style-name="ce75">
            <text:p>IVVN</text:p>
          </table:table-cell>
          <table:table-cell office:value-type="string" table:style-name="ce97">
            <text:p>Lunar script</text:p>
          </table:table-cell>
          <table:table-cell office:value-type="string" table:style-name="ce98">
            <text:p>Inqaba Biotec East Africa</text:p>
          </table:table-cell>
          <table:table-cell office:value-type="float" office:value="34739" table:style-name="ce99">
            <text:p><text:s/>34,739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float" office:value="12247" table:style-name="ce93">
            <text:p>12247</text:p>
          </table:table-cell>
          <table:table-cell office:value-type="float" office:value="133777" table:style-name="ce94">
            <text:p>133777</text:p>
          </table:table-cell>
          <table:table-cell office:value-type="string" table:style-name="ce75">
            <text:p>IVVN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Willcare Enterprises</text:p>
          </table:table-cell>
          <table:table-cell office:value-type="float" office:value="25000" table:style-name="ce99">
            <text:p><text:s/>25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2248" table:style-name="ce93">
            <text:p>12248</text:p>
          </table:table-cell>
          <table:table-cell office:value-type="float" office:value="133778" table:style-name="ce94">
            <text:p>133778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Safe views</text:p>
          </table:table-cell>
          <table:table-cell office:value-type="string" table:style-name="ce98">
            <text:p>Inqaba Biotec East Africa</text:p>
          </table:table-cell>
          <table:table-cell office:value-type="float" office:value="8652" table:style-name="ce99">
            <text:p><text:s/>8,65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2248" table:style-name="ce93">
            <text:p>12248</text:p>
          </table:table-cell>
          <table:table-cell office:value-type="float" office:value="133779" table:style-name="ce94">
            <text:p>133779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Willcare Enterprises</text:p>
          </table:table-cell>
          <table:table-cell office:value-type="float" office:value="14980" table:style-name="ce99">
            <text:p><text:s/>14,9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2250" table:style-name="ce93">
            <text:p>12250</text:p>
          </table:table-cell>
          <table:table-cell office:value-type="float" office:value="133780" table:style-name="ce94">
            <text:p>133780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Fridge thermometer and digital timer</text:p>
          </table:table-cell>
          <table:table-cell office:value-type="string" table:style-name="ce98">
            <text:p>Dasomic Enterprises</text:p>
          </table:table-cell>
          <table:table-cell office:value-type="float" office:value="11400" table:style-name="ce99">
            <text:p><text:s/>11,4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33315" table:style-name="ce93">
            <text:p>133315</text:p>
          </table:table-cell>
          <table:table-cell office:value-type="float" office:value="133781" table:style-name="ce94">
            <text:p>133781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service of generator</text:p>
          </table:table-cell>
          <table:table-cell office:value-type="string" table:style-name="ce100">
            <text:p>Blackwood Hodge ltd</text:p>
          </table:table-cell>
          <table:table-cell office:value-type="float" office:value="43094" table:style-name="ce99">
            <text:p><text:s/>43,094.00<text:s/></text:p>
          </table:table-cell>
          <table:table-cell office:value-type="float" office:value="43094" table:style-name="ce89">
            <text:p>43,094.00<text:s/></text:p>
          </table:table-cell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4006" table:style-name="ce93">
            <text:p>14006</text:p>
          </table:table-cell>
          <table:table-cell office:value-type="float" office:value="133782" table:style-name="ce94">
            <text:p>13378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ALSOFT Sanitizer</text:p>
          </table:table-cell>
          <table:table-cell office:value-type="string" table:style-name="ce98">
            <text:p>Saraya kenya ltd</text:p>
          </table:table-cell>
          <table:table-cell office:value-type="float" office:value="36000" table:style-name="ce99">
            <text:p><text:s/>36,000.00<text:s/></text:p>
          </table:table-cell>
          <table:table-cell office:value-type="float" office:value="36000" table:style-name="ce89">
            <text:p>36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string" table:style-name="ce93">
            <text:p>14016/12991</text:p>
          </table:table-cell>
          <table:table-cell office:value-type="float" office:value="133783" table:style-name="ce94">
            <text:p>133783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Surgical face mask and biohazard bags</text:p>
          </table:table-cell>
          <table:table-cell office:value-type="string" table:style-name="ce98">
            <text:p>Vast Scientific kenya ltd</text:p>
          </table:table-cell>
          <table:table-cell office:value-type="float" office:value="22000" table:style-name="ce99">
            <text:p><text:s/>22,000.00<text:s/></text:p>
          </table:table-cell>
          <table:table-cell office:value-type="float" office:value="22000" table:style-name="ce89">
            <text:p>22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2992" table:style-name="ce93">
            <text:p>12992</text:p>
          </table:table-cell>
          <table:table-cell office:value-type="float" office:value="133784" table:style-name="ce94">
            <text:p>133784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Black polythene bags</text:p>
          </table:table-cell>
          <table:table-cell office:value-type="string" table:style-name="ce98">
            <text:p>Medi system supply&amp;service</text:p>
          </table:table-cell>
          <table:table-cell office:value-type="float" office:value="4500" table:style-name="ce99">
            <text:p><text:s/>4,500.00<text:s/></text:p>
          </table:table-cell>
          <table:table-cell office:value-type="float" office:value="4500" table:style-name="ce89">
            <text:p>4,500.00<text:s/></text:p>
          </table:table-cell>
          <table:table-cell table:number-columns-repeated="16376"/>
        </table:table-row>
        <table:table-row table:style-name="ro1">
          <table:table-cell office:value-type="date" office:date-value="2022-03-24T00:00:00" table:style-name="ce92">
            <text:p>03/24/2022</text:p>
          </table:table-cell>
          <table:table-cell office:value-type="float" office:value="11975" table:style-name="ce93">
            <text:p>11975</text:p>
          </table:table-cell>
          <table:table-cell office:value-type="float" office:value="133785" table:style-name="ce94">
            <text:p>133785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Blood group sera</text:p>
          </table:table-cell>
          <table:table-cell office:value-type="string" table:style-name="ce98">
            <text:p>Chem-labs ltd</text:p>
          </table:table-cell>
          <table:table-cell office:value-type="float" office:value="2900" table:style-name="ce99">
            <text:p><text:s/>2,9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1273" table:style-name="ce93">
            <text:p>11273</text:p>
          </table:table-cell>
          <table:table-cell office:value-type="float" office:value="133786" table:style-name="ce94">
            <text:p>133786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pair of cold room</text:p>
          </table:table-cell>
          <table:table-cell office:value-type="string" table:style-name="ce98">
            <text:p>Arclink Enterprises</text:p>
          </table:table-cell>
          <table:table-cell office:value-type="float" office:value="49500" table:style-name="ce99">
            <text:p><text:s/>49,500.00<text:s/></text:p>
          </table:table-cell>
          <table:table-cell office:value-type="float" office:value="49500" table:style-name="ce89">
            <text:p>49,500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string" table:style-name="ce93">
            <text:p>11609/11</text:p>
          </table:table-cell>
          <table:table-cell office:value-type="float" office:value="133787" table:style-name="ce94">
            <text:p>133787</text:p>
          </table:table-cell>
          <table:table-cell office:value-type="string" table:style-name="ce75">
            <text:p>Library</text:p>
          </table:table-cell>
          <table:table-cell office:value-type="string" table:style-name="ce97">
            <text:p>office furniture</text:p>
          </table:table-cell>
          <table:table-cell office:value-type="string" table:style-name="ce98">
            <text:p>Fast choice ltd</text:p>
          </table:table-cell>
          <table:table-cell office:value-type="float" office:value="296742" table:style-name="ce99">
            <text:p><text:s/>296,742.00<text:s/></text:p>
          </table:table-cell>
          <table:table-cell office:value-type="float" office:value="296742" table:style-name="ce89">
            <text:p>296,742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string" table:style-name="ce93">
            <text:p>11611/09</text:p>
          </table:table-cell>
          <table:table-cell office:value-type="float" office:value="133788" table:style-name="ce94">
            <text:p>133788</text:p>
          </table:table-cell>
          <table:table-cell office:value-type="string" table:style-name="ce75">
            <text:p>Library</text:p>
          </table:table-cell>
          <table:table-cell office:value-type="string" table:style-name="ce97">
            <text:p>Electrical items</text:p>
          </table:table-cell>
          <table:table-cell office:value-type="string" table:style-name="ce98">
            <text:p>Pinnacore Kenya Ltd</text:p>
          </table:table-cell>
          <table:table-cell office:value-type="float" office:value="21025" table:style-name="ce99">
            <text:p><text:s/>21,02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0740" table:style-name="ce93">
            <text:p>10740</text:p>
          </table:table-cell>
          <table:table-cell office:value-type="float" office:value="133789" table:style-name="ce94">
            <text:p>133789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Chandaria industries</text:p>
          </table:table-cell>
          <table:table-cell office:value-type="float" office:value="117810" table:style-name="ce99">
            <text:p><text:s/>117,810.00<text:s/></text:p>
          </table:table-cell>
          <table:table-cell office:value-type="float" office:value="117810" table:style-name="ce89">
            <text:p>117,810.00<text:s/>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924" table:style-name="ce93">
            <text:p>13924</text:p>
          </table:table-cell>
          <table:table-cell office:value-type="float" office:value="133790" table:style-name="ce94">
            <text:p>13379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4 way consumer contact unit</text:p>
          </table:table-cell>
          <table:table-cell office:value-type="string" table:style-name="ce98">
            <text:p>BigQ Traders</text:p>
          </table:table-cell>
          <table:table-cell office:value-type="float" office:value="6790" table:style-name="ce99">
            <text:p><text:s/>6,7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915" table:style-name="ce93">
            <text:p>13915</text:p>
          </table:table-cell>
          <table:table-cell office:value-type="float" office:value="133792" table:style-name="ce94">
            <text:p>133792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Tronic flood lights</text:p>
          </table:table-cell>
          <table:table-cell office:value-type="string" table:style-name="ce98">
            <text:p>Bluesteki Ventures</text:p>
          </table:table-cell>
          <table:table-cell office:value-type="float" office:value="8400" table:style-name="ce99">
            <text:p><text:s/>8,4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Supply of fruits and vegetables march22</text:p>
          </table:table-cell>
          <table:table-cell office:value-type="string" table:style-name="ce74">
            <text:p>Sirandu investment</text:p>
          </table:table-cell>
          <table:table-cell office:value-type="float" office:value="121250" table:style-name="ce91">
            <text:p>121250.00</text:p>
          </table:table-cell>
          <table:table-cell office:value-type="float" office:value="121250" table:style-name="ce91">
            <text:p>12125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mar 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mar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maintainance of cold room(quarter)</text:p>
          </table:table-cell>
          <table:table-cell office:value-type="string" table:style-name="ce74">
            <text:p>Arclink enterprises</text:p>
          </table:table-cell>
          <table:table-cell office:value-type="float" office:value="21600" table:style-name="ce91">
            <text:p>21600.00</text:p>
          </table:table-cell>
          <table:table-cell office:value-type="float" office:value="21600" table:style-name="ce91">
            <text:p>216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95">
            <text:p>maintainance of air conditioner(quarter)</text:p>
          </table:table-cell>
          <table:table-cell office:value-type="string" table:style-name="ce74">
            <text:p>Samu retri-Electricals</text:p>
          </table:table-cell>
          <table:table-cell office:value-type="float" office:value="137400" table:style-name="ce91">
            <text:p>137400.00</text:p>
          </table:table-cell>
          <table:table-cell office:value-type="float" office:value="137400" table:style-name="ce91">
            <text:p>137400.00</text:p>
          </table:table-cell>
          <table:table-cell table:number-columns-repeated="16376"/>
        </table:table-row>
        <table:table-row table:style-name="ro1">
          <table:table-cell office:value-type="string" table:style-name="ce92">
            <text:p><text:span text:style-name="T6">TOTA</text:span>L</text:p>
          </table:table-cell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office:value-type="float" office:value="8830697" table:formula="of:=SUM([.G8:.G235])" table:style-name="ce101">
            <text:p><text:s/>8,830,697.00<text:s/></text:p>
          </table:table-cell>
          <table:table-cell office:value-type="float" office:value="3968568" table:formula="of:=SUM([.H8:.H235])" table:style-name="ce90">
            <text:p>3,968,568.00<text:s/></text:p>
          </table:table-cell>
          <table:table-cell table:number-columns-repeated="16376"/>
        </table:table-row>
        <table:table-row table:style-name="ro1">
          <table:table-cell table:style-name="ce92"/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table:style-name="ce99"/>
          <table:table-cell table:style-name="ce89"/>
          <table:table-cell table:number-columns-repeated="16376"/>
        </table:table-row>
        <table:table-row table:style-name="ro1">
          <table:table-cell table:style-name="ce102"/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table:style-name="ce101"/>
          <table:table-cell table:style-name="ce103"/>
          <table:table-cell table:number-columns-repeated="16376"/>
        </table:table-row>
        <table:table-row table:style-name="ro1">
          <table:table-cell table:style-name="ce104"/>
          <table:table-cell table:style-name="ce105"/>
          <table:table-cell table:style-name="ce94"/>
          <table:table-cell table:style-name="ce75"/>
          <table:table-cell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1">
          <table:table-cell table:number-columns-repeated="2" table:style-name="ce105"/>
          <table:table-cell table:style-name="ce93"/>
          <table:table-cell table:number-columns-repeated="3" table:style-name="ce105"/>
          <table:table-cell table:style-name="ce101"/>
          <table:table-cell table:style-name="ce106"/>
          <table:table-cell table:number-columns-repeated="16376"/>
        </table:table-row>
        <table:table-row table:style-name="ro1">
          <table:table-cell office:value-type="string" table:style-name="ce1">
            <text:p>Local goods percentage for the quarter 45%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cal goods purchased</text:p>
          </table:table-cell>
          <table:table-cell table:style-name="ce1"/>
          <table:table-cell office:value-type="float" office:value="3968568" table:style-name="ce107">
            <text:p><text:s/>3,968,568.00<text:s/></text:p>
          </table:table-cell>
          <table:table-cell office:value-type="string" table:style-name="ce108">
            <text:p>%=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tal expenditure</text:p>
          </table:table-cell>
          <table:table-cell table:style-name="ce1"/>
          <table:table-cell office:value-type="float" office:value="8830697" table:style-name="ce99">
            <text:p><text:s/>8,830,697.0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epared by………………………………………..Signature………………………………….Date</text:p>
          </table:table-cell>
          <table:table-cell table:number-columns-repeated="3" table:style-name="ce1"/>
          <table:table-cell office:value-type="string" table:style-name="ce109">
            <text:p>…………….………..…Date…………………………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roved by………………………………………..Signature………………………………….Date………………………….</text:p>
          </table:table-cell>
          <table:table-cell table:number-columns-repeated="16383" table:style-name="ce1"/>
        </table:table-row>
        <table:table-row table:number-rows-repeated="1048329" table:style-name="ro1">
          <table:table-cell table:number-columns-repeated="16384"/>
        </table:table-row>
      </table:table>
      <table:table table:name="3RD_QUARTER_PPRO_REPORT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017" table:default-cell-style-name="ce1"/>
        <table:table-column table:style-name="co14" table:number-columns-repeated="15360" table:default-cell-style-name="ce1"/>
        <table:table-row table:number-rows-repeated="2" table:style-name="ro7">
          <table:table-cell table:number-columns-repeated="8" table:style-name="ce59"/>
          <table:table-cell table:number-columns-repeated="16376"/>
        </table:table-row>
        <table:table-row table:style-name="ro2">
          <table:table-cell office:value-type="string" table:style-name="ce110">
            <text:p>3RDQUARTER REPORT FROM JAN 2022 TO MARCH 2022 INSTITUTE OF PRIMATE RESEARCH</text:p>
          </table:table-cell>
          <table:table-cell table:style-name="ce110"/>
          <table:table-cell table:style-name="ce111"/>
          <table:table-cell table:number-columns-repeated="2" table:style-name="ce112"/>
          <table:table-cell table:style-name="ce113"/>
          <table:table-cell table:style-name="ce112"/>
          <table:table-cell table:style-name="ce59"/>
          <table:table-cell table:number-columns-repeated="16376"/>
        </table:table-row>
        <table:table-row table:style-name="ro2">
          <table:table-cell office:value-type="string" table:style-name="ce110">
            <text:p>Section B: All Contracts Awards to the Target Group (Youth,Women and PWD)</text:p>
          </table:table-cell>
          <table:table-cell table:style-name="ce110"/>
          <table:table-cell table:style-name="ce114"/>
          <table:table-cell table:style-name="ce115"/>
          <table:table-cell table:style-name="ce112"/>
          <table:table-cell table:style-name="ce116"/>
          <table:table-cell table:style-name="ce112"/>
          <table:table-cell table:style-name="ce59"/>
          <table:table-cell table:number-columns-repeated="16376"/>
        </table:table-row>
        <table:table-row table:style-name="ro2">
          <table:table-cell office:value-type="string" table:style-name="ce110">
            <text:p>Note: All columns should be filled in as appropriare</text:p>
          </table:table-cell>
          <table:table-cell table:style-name="ce110"/>
          <table:table-cell table:style-name="ce114"/>
          <table:table-cell table:style-name="ce115"/>
          <table:table-cell table:style-name="ce112"/>
          <table:table-cell table:style-name="ce116"/>
          <table:table-cell table:style-name="ce112"/>
          <table:table-cell table:style-name="ce59"/>
          <table:table-cell table:number-columns-repeated="16376"/>
        </table:table-row>
        <table:table-row table:style-name="ro13">
          <table:table-cell office:value-type="string" table:style-name="ce117">
            <text:p>Supplier/Contractor Name Business name as appears in the AGPO Cert</text:p>
          </table:table-cell>
          <table:table-cell office:value-type="string" table:style-name="ce117">
            <text:p>Names of Directors</text:p>
          </table:table-cell>
          <table:table-cell office:value-type="string" table:style-name="ce118">
            <text:p>Nature of Contract (goods/works/ non-consultancy/consultancy services</text:p>
          </table:table-cell>
          <table:table-cell office:value-type="string" table:style-name="ce117">
            <text:p>Tender/ quotation No &amp;Description</text:p>
          </table:table-cell>
          <table:table-cell office:value-type="string" table:style-name="ce117">
            <text:p>Method of Procurment</text:p>
          </table:table-cell>
          <table:table-cell office:value-type="string" table:style-name="ce119">
            <text:p>LPO/LSO/Contract</text:p>
          </table:table-cell>
          <table:table-cell office:value-type="string" table:style-name="ce117">
            <text:p>Contract Value</text:p>
          </table:table-cell>
          <table:table-cell table:style-name="ce59"/>
          <table:table-cell table:number-columns-repeated="16376"/>
        </table:table-row>
        <table:table-row table:style-name="ro7">
          <table:table-cell table:style-name="ce120"/>
          <table:table-cell table:style-name="ce121"/>
          <table:table-cell office:value-type="string" table:style-name="ce118">
            <text:p>PWD</text:p>
          </table:table-cell>
          <table:table-cell table:style-name="ce121"/>
          <table:table-cell table:style-name="ce122"/>
          <table:table-cell table:style-name="ce123"/>
          <table:table-cell table:style-name="ce124"/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igQ Traders</text:p>
          </table:table-cell>
          <table:table-cell office:value-type="string" table:style-name="ce93">
            <text:p>veronica kihut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4 way consumable contact unit</text:p>
          </table:table-cell>
          <table:table-cell office:value-type="string" table:style-name="ce122">
            <text:p>Quotation</text:p>
          </table:table-cell>
          <table:table-cell office:value-type="float" office:value="133790" table:style-name="ce94">
            <text:p>133790</text:p>
          </table:table-cell>
          <table:table-cell office:value-type="float" office:value="6790" table:style-name="ce126">
            <text:p>679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luesteki Ventures</text:p>
          </table:table-cell>
          <table:table-cell office:value-type="string" table:style-name="ce93">
            <text:p>chrispus Gathiaka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Tronic flood lights 100A</text:p>
          </table:table-cell>
          <table:table-cell office:value-type="string" table:style-name="ce122">
            <text:p>Quotation</text:p>
          </table:table-cell>
          <table:table-cell office:value-type="float" office:value="133792" table:style-name="ce94">
            <text:p>133792</text:p>
          </table:table-cell>
          <table:table-cell office:value-type="float" office:value="8400" table:style-name="ce126">
            <text:p>840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matgen International ltd</text:p>
          </table:table-cell>
          <table:table-cell office:value-type="string" table:style-name="ce74">
            <text:p>Veronica Mwikali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7" table:style-name="ce74">
            <text:p>133687</text:p>
          </table:table-cell>
          <table:table-cell office:value-type="float" office:value="60720" table:style-name="ce127">
            <text:p>6072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idanda Enterprises</text:p>
          </table:table-cell>
          <table:table-cell office:value-type="string" table:style-name="ce74">
            <text:p>Johnson Irungu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8" table:style-name="ce74">
            <text:p>133688</text:p>
          </table:table-cell>
          <table:table-cell office:value-type="float" office:value="72460" table:style-name="ce127">
            <text:p>7246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matgen International ltd</text:p>
          </table:table-cell>
          <table:table-cell office:value-type="string" table:style-name="ce74">
            <text:p>Veronica Mwikali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9" table:style-name="ce74">
            <text:p>133689</text:p>
          </table:table-cell>
          <table:table-cell office:value-type="float" office:value="215560" table:style-name="ce127">
            <text:p>21556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idanda Enterprises</text:p>
          </table:table-cell>
          <table:table-cell office:value-type="string" table:style-name="ce74">
            <text:p>Johnson Irungu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90" table:style-name="ce74">
            <text:p>133690</text:p>
          </table:table-cell>
          <table:table-cell office:value-type="float" office:value="146820" table:style-name="ce127">
            <text:p>14682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eutsal International</text:p>
          </table:table-cell>
          <table:table-cell office:value-type="string" table:style-name="ce93">
            <text:p>Doughlas Sidial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Stationeries</text:p>
          </table:table-cell>
          <table:table-cell office:value-type="string" table:style-name="ce122">
            <text:p>Quotation</text:p>
          </table:table-cell>
          <table:table-cell office:value-type="float" office:value="133757" table:style-name="ce128">
            <text:p>133757</text:p>
          </table:table-cell>
          <table:table-cell office:value-type="float" office:value="102227" table:style-name="ce126">
            <text:p>102227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Maxi print &amp;colour ltd</text:p>
          </table:table-cell>
          <table:table-cell office:value-type="string" table:style-name="ce93">
            <text:p>Boniface Ondeny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Stationeries</text:p>
          </table:table-cell>
          <table:table-cell office:value-type="string" table:style-name="ce122">
            <text:p>Quotation</text:p>
          </table:table-cell>
          <table:table-cell office:value-type="float" office:value="133758" table:style-name="ce128">
            <text:p>133758</text:p>
          </table:table-cell>
          <table:table-cell office:value-type="float" office:value="28464" table:style-name="ce126">
            <text:p>28464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Dasomic Enterprises</text:p>
          </table:table-cell>
          <table:table-cell office:value-type="string" table:style-name="ce74">
            <text:p>Maurice Awino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Fridge thermometer and digital timers</text:p>
          </table:table-cell>
          <table:table-cell office:value-type="string" table:style-name="ce122">
            <text:p>Quotation</text:p>
          </table:table-cell>
          <table:table-cell office:value-type="float" office:value="133780" table:style-name="ce74">
            <text:p>133780</text:p>
          </table:table-cell>
          <table:table-cell office:value-type="float" office:value="11400" table:style-name="ce127">
            <text:p>1140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Danbecos Enterprises</text:p>
          </table:table-cell>
          <table:table-cell office:value-type="string" table:style-name="ce93">
            <text:p>Daniel Muinde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paints,nails,paint brushes and poly fillers</text:p>
          </table:table-cell>
          <table:table-cell office:value-type="string" table:style-name="ce122">
            <text:p>Quotation</text:p>
          </table:table-cell>
          <table:table-cell office:value-type="float" office:value="133678" table:style-name="ce129">
            <text:p>133678</text:p>
          </table:table-cell>
          <table:table-cell office:value-type="float" office:value="43868" table:style-name="ce126">
            <text:p>43868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30">
            <text:p>TOTAL</text:p>
          </table:table-cell>
          <table:table-cell table:style-name="ce131"/>
          <table:table-cell table:style-name="ce125"/>
          <table:table-cell table:style-name="ce95"/>
          <table:table-cell table:style-name="ce122"/>
          <table:table-cell table:style-name="ce132"/>
          <table:table-cell office:value-type="float" office:value="696709" table:formula="of:=SUM([.G8:.G17])" table:style-name="ce133">
            <text:p>696709.00</text:p>
          </table:table-cell>
          <table:table-cell table:style-name="ce59"/>
          <table:table-cell table:number-columns-repeated="16376"/>
        </table:table-row>
        <table:table-row table:style-name="ro2">
          <table:table-cell table:style-name="ce95"/>
          <table:table-cell table:style-name="ce105"/>
          <table:table-cell table:style-name="ce125"/>
          <table:table-cell table:style-name="ce95"/>
          <table:table-cell table:style-name="ce122"/>
          <table:table-cell table:style-name="ce134"/>
          <table:table-cell table:style-name="ce131"/>
          <table:table-cell table:style-name="ce59"/>
          <table:table-cell table:number-columns-repeated="16376"/>
        </table:table-row>
        <table:table-row table:style-name="ro7">
          <table:table-cell table:style-name="ce117"/>
          <table:table-cell table:style-name="ce122"/>
          <table:table-cell office:value-type="string" table:style-name="ce135">
            <text:p>WOMEN</text:p>
          </table:table-cell>
          <table:table-cell table:style-name="ce122"/>
          <table:table-cell table:style-name="ce121"/>
          <table:table-cell table:style-name="ce136"/>
          <table:table-cell table:style-name="ce122"/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kenya toner ink supplies ltd</text:p>
          </table:table-cell>
          <table:table-cell office:value-type="string" table:style-name="ce74">
            <text:p>florence Nzisa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print catridges HP CF</text:p>
          </table:table-cell>
          <table:table-cell office:value-type="string" table:style-name="ce88">
            <text:p>Quotations</text:p>
          </table:table-cell>
          <table:table-cell office:value-type="float" office:value="133549" table:style-name="ce74">
            <text:p>133549</text:p>
          </table:table-cell>
          <table:table-cell office:value-type="float" office:value="61340" table:style-name="ce137">
            <text:p>6134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Zippytech Agency</text:p>
          </table:table-cell>
          <table:table-cell office:value-type="string" table:style-name="ce74">
            <text:p>Hellen Mains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 19A,CF219A,05A</text:p>
          </table:table-cell>
          <table:table-cell office:value-type="string" table:style-name="ce88">
            <text:p>Quotations</text:p>
          </table:table-cell>
          <table:table-cell office:value-type="float" office:value="133667" table:style-name="ce74">
            <text:p>133667</text:p>
          </table:table-cell>
          <table:table-cell office:value-type="float" office:value="17850" table:style-name="ce137">
            <text:p>178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Pamtop Supplies</text:p>
          </table:table-cell>
          <table:table-cell office:value-type="string" table:style-name="ce74">
            <text:p>Mary Pamela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s 17A,13A</text:p>
          </table:table-cell>
          <table:table-cell office:value-type="string" table:style-name="ce88">
            <text:p>Quotations</text:p>
          </table:table-cell>
          <table:table-cell office:value-type="float" office:value="133668" table:style-name="ce74">
            <text:p>133668</text:p>
          </table:table-cell>
          <table:table-cell office:value-type="float" office:value="37060" table:style-name="ce137">
            <text:p>370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Kaswii Investments ltd</text:p>
          </table:table-cell>
          <table:table-cell office:value-type="string" table:style-name="ce74">
            <text:p>Joyce muthinzi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 17A</text:p>
          </table:table-cell>
          <table:table-cell office:value-type="string" table:style-name="ce88">
            <text:p>Quotations</text:p>
          </table:table-cell>
          <table:table-cell office:value-type="float" office:value="133697" table:style-name="ce74">
            <text:p>133697</text:p>
          </table:table-cell>
          <table:table-cell office:value-type="float" office:value="24960" table:style-name="ce137">
            <text:p>249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Cechum Enterprises</text:p>
          </table:table-cell>
          <table:table-cell office:value-type="string" table:style-name="ce74">
            <text:p>Cecillia wairimu</text:p>
          </table:table-cell>
          <table:table-cell office:value-type="string" table:style-name="ce74">
            <text:p>Goods</text:p>
          </table:table-cell>
          <table:table-cell office:value-type="string" table:style-name="ce138">
            <text:p>Catridge mfpm28 203</text:p>
          </table:table-cell>
          <table:table-cell office:value-type="string" table:style-name="ce88">
            <text:p>Quotations</text:p>
          </table:table-cell>
          <table:table-cell office:value-type="float" office:value="133698" table:style-name="ce138">
            <text:p>133698</text:p>
          </table:table-cell>
          <table:table-cell office:value-type="float" office:value="54150" table:style-name="ce137">
            <text:p>541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38">
            <text:p>Goods</text:p>
          </table:table-cell>
          <table:table-cell office:value-type="string" table:style-name="ce74">
            <text:p>Supply of fruits and vegetables for jan 2022</text:p>
          </table:table-cell>
          <table:table-cell office:value-type="string" table:style-name="ce88">
            <text:p>Quotations</text:p>
          </table:table-cell>
          <table:table-cell office:value-type="string" table:style-name="ce138">
            <text:p>Contract</text:p>
          </table:table-cell>
          <table:table-cell office:value-type="float" office:value="101200" table:style-name="ce137">
            <text:p>1012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39">
            <text:p>services</text:p>
          </table:table-cell>
          <table:table-cell office:value-type="string" table:style-name="ce74">
            <text:p>provision of sanitary services jan 2022</text:p>
          </table:table-cell>
          <table:table-cell office:value-type="string" table:style-name="ce121">
            <text:p>Quotations</text:p>
          </table:table-cell>
          <table:table-cell office:value-type="string" table:style-name="ce138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38">
            <text:p>Goods</text:p>
          </table:table-cell>
          <table:table-cell office:value-type="string" table:style-name="ce74">
            <text:p>Supply of fruits and vegetables for feb 2022</text:p>
          </table:table-cell>
          <table:table-cell office:value-type="string" table:style-name="ce140">
            <text:p>Quotations</text:p>
          </table:table-cell>
          <table:table-cell office:value-type="string" table:style-name="ce94">
            <text:p>Contract</text:p>
          </table:table-cell>
          <table:table-cell office:value-type="float" office:value="96400" table:style-name="ce137">
            <text:p>9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39">
            <text:p>services</text:p>
          </table:table-cell>
          <table:table-cell office:value-type="string" table:style-name="ce74">
            <text:p>provision of sanitary services feb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upply of fruits and vegetables for mar 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121250" table:style-name="ce137">
            <text:p>12125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41">
            <text:p>services</text:p>
          </table:table-cell>
          <table:table-cell office:value-type="string" table:style-name="ce74">
            <text:p>provision of sanitary services mar 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nacore kenya ltd</text:p>
          </table:table-cell>
          <table:table-cell office:value-type="string" table:style-name="ce93">
            <text:p>S.W.Kiari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electrical accessories</text:p>
          </table:table-cell>
          <table:table-cell office:value-type="string" table:style-name="ce140">
            <text:p>Quotations</text:p>
          </table:table-cell>
          <table:table-cell office:value-type="float" office:value="133788" table:style-name="ce94">
            <text:p>133788</text:p>
          </table:table-cell>
          <table:table-cell office:value-type="float" office:value="21025" table:style-name="ce131">
            <text:p>21025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Fast choice ltd</text:p>
          </table:table-cell>
          <table:table-cell office:value-type="string" table:style-name="ce74">
            <text:p>Anne Kiarie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metallic shelves and book cards</text:p>
          </table:table-cell>
          <table:table-cell office:value-type="string" table:style-name="ce140">
            <text:p>Quotations</text:p>
          </table:table-cell>
          <table:table-cell office:value-type="float" office:value="133787" table:style-name="ce74">
            <text:p>133787</text:p>
          </table:table-cell>
          <table:table-cell office:value-type="float" office:value="296742" table:style-name="ce137">
            <text:p>296742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Life watchers supplies ltd</text:p>
          </table:table-cell>
          <table:table-cell office:value-type="string" table:style-name="ce93">
            <text:p>Jane Nyambura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Lab Reagents</text:p>
          </table:table-cell>
          <table:table-cell office:value-type="string" table:style-name="ce140">
            <text:p>Quotations</text:p>
          </table:table-cell>
          <table:table-cell office:value-type="float" office:value="133672" table:style-name="ce74">
            <text:p>133672</text:p>
          </table:table-cell>
          <table:table-cell office:value-type="float" office:value="144600" table:style-name="ce137">
            <text:p>144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Wilcare Enterprises</text:p>
          </table:table-cell>
          <table:table-cell office:value-type="string" table:style-name="ce93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Ethanol GPR</text:p>
          </table:table-cell>
          <table:table-cell office:value-type="string" table:style-name="ce140">
            <text:p>Quotations</text:p>
          </table:table-cell>
          <table:table-cell office:value-type="float" office:value="133677" table:style-name="ce74">
            <text:p>133677</text:p>
          </table:table-cell>
          <table:table-cell office:value-type="float" office:value="57600" table:style-name="ce137">
            <text:p>57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Floging East Africa</text:p>
          </table:table-cell>
          <table:table-cell office:value-type="string" table:style-name="ce93">
            <text:p>Florence Nkirot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A3 Folded Nero 5 letters</text:p>
          </table:table-cell>
          <table:table-cell office:value-type="string" table:style-name="ce140">
            <text:p>Quotations</text:p>
          </table:table-cell>
          <table:table-cell office:value-type="float" office:value="133661" table:style-name="ce128">
            <text:p>133661</text:p>
          </table:table-cell>
          <table:table-cell office:value-type="float" office:value="41600" table:style-name="ce131">
            <text:p>41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nacore Kenya Ltd</text:p>
          </table:table-cell>
          <table:table-cell office:value-type="string" table:style-name="ce93">
            <text:p>S.W.Kiari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Branded biros and Envelopes</text:p>
          </table:table-cell>
          <table:table-cell office:value-type="string" table:style-name="ce140">
            <text:p>Quotations</text:p>
          </table:table-cell>
          <table:table-cell office:value-type="float" office:value="133665" table:style-name="ce128">
            <text:p>133665</text:p>
          </table:table-cell>
          <table:table-cell office:value-type="float" office:value="57000" table:style-name="ce131">
            <text:p>570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point hygiene services ltd</text:p>
          </table:table-cell>
          <table:table-cell office:value-type="string" table:style-name="ce93">
            <text:p>Jane Wachira</text:p>
          </table:table-cell>
          <table:table-cell office:value-type="string" table:style-name="ce141">
            <text:p>services</text:p>
          </table:table-cell>
          <table:table-cell office:value-type="string" table:style-name="ce95">
            <text:p>Floor sanding and polishing of old library</text:p>
          </table:table-cell>
          <table:table-cell office:value-type="string" table:style-name="ce140">
            <text:p>Quotations</text:p>
          </table:table-cell>
          <table:table-cell office:value-type="float" office:value="133545" table:style-name="ce128">
            <text:p>133545</text:p>
          </table:table-cell>
          <table:table-cell office:value-type="float" office:value="64080" table:style-name="ce131">
            <text:p>6408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Kenya Toner and ink supplies</text:p>
          </table:table-cell>
          <table:table-cell office:value-type="string" table:style-name="ce74">
            <text:p>florence Nzisa</text:p>
          </table:table-cell>
          <table:table-cell office:value-type="string" table:style-name="ce142">
            <text:p>Goods</text:p>
          </table:table-cell>
          <table:table-cell office:value-type="string" table:style-name="ce74">
            <text:p>Hp pro desk 400 tt systems</text:p>
          </table:table-cell>
          <table:table-cell office:value-type="string" table:style-name="ce143">
            <text:p>Quotations</text:p>
          </table:table-cell>
          <table:table-cell office:value-type="float" office:value="133657" table:style-name="ce74">
            <text:p>133657</text:p>
          </table:table-cell>
          <table:table-cell office:value-type="float" office:value="122193" table:style-name="ce137">
            <text:p>122193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Hill converters</text:p>
          </table:table-cell>
          <table:table-cell office:value-type="string" table:style-name="ce145">
            <text:p>Joseph Theuri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A2 Size calendars</text:p>
          </table:table-cell>
          <table:table-cell office:value-type="string" table:style-name="ce140">
            <text:p>Quotations</text:p>
          </table:table-cell>
          <table:table-cell office:value-type="float" office:value="133659" table:style-name="ce146">
            <text:p>133659</text:p>
          </table:table-cell>
          <table:table-cell office:value-type="float" office:value="84440" table:style-name="ce147">
            <text:p>8444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terile surgical blades</text:p>
          </table:table-cell>
          <table:table-cell office:value-type="string" table:style-name="ce140">
            <text:p>Quotations</text:p>
          </table:table-cell>
          <table:table-cell office:value-type="float" office:value="133544" table:style-name="ce74">
            <text:p>133544</text:p>
          </table:table-cell>
          <table:table-cell office:value-type="float" office:value="14600" table:style-name="ce137">
            <text:p>14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wabs for Bat sample</text:p>
          </table:table-cell>
          <table:table-cell office:value-type="string" table:style-name="ce140">
            <text:p>Quotations</text:p>
          </table:table-cell>
          <table:table-cell office:value-type="float" office:value="133675" table:style-name="ce74">
            <text:p>133675</text:p>
          </table:table-cell>
          <table:table-cell office:value-type="float" office:value="20020" table:style-name="ce137">
            <text:p>2002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Eperndorf tubes and nitrile gloves</text:p>
          </table:table-cell>
          <table:table-cell office:value-type="string" table:style-name="ce140">
            <text:p>Quotations</text:p>
          </table:table-cell>
          <table:table-cell office:value-type="float" office:value="133685" table:style-name="ce148">
            <text:p>133685</text:p>
          </table:table-cell>
          <table:table-cell office:value-type="float" office:value="76100" table:style-name="ce147">
            <text:p>761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Nitule Gloves</text:p>
          </table:table-cell>
          <table:table-cell office:value-type="string" table:style-name="ce140">
            <text:p>Quotations</text:p>
          </table:table-cell>
          <table:table-cell office:value-type="float" office:value="133753" table:style-name="ce148">
            <text:p>133753</text:p>
          </table:table-cell>
          <table:table-cell office:value-type="float" office:value="32600" table:style-name="ce147">
            <text:p>32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laboratory consumables</text:p>
          </table:table-cell>
          <table:table-cell office:value-type="string" table:style-name="ce140">
            <text:p>Quotations</text:p>
          </table:table-cell>
          <table:table-cell office:value-type="float" office:value="133777" table:style-name="ce148">
            <text:p>133777</text:p>
          </table:table-cell>
          <table:table-cell office:value-type="float" office:value="25000" table:style-name="ce147">
            <text:p>250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Nitrate gloves and microcentrifuge</text:p>
          </table:table-cell>
          <table:table-cell office:value-type="string" table:style-name="ce140">
            <text:p>Quotations</text:p>
          </table:table-cell>
          <table:table-cell office:value-type="float" office:value="133779" table:style-name="ce148">
            <text:p>133779</text:p>
          </table:table-cell>
          <table:table-cell office:value-type="float" office:value="14980" table:style-name="ce147">
            <text:p>1498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Sanol Holding</text:p>
          </table:table-cell>
          <table:table-cell office:value-type="string" table:style-name="ce93">
            <text:p>Grac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40">
            <text:p>Quotations</text:p>
          </table:table-cell>
          <table:table-cell office:value-type="float" office:value="133693" table:style-name="ce129">
            <text:p>133693</text:p>
          </table:table-cell>
          <table:table-cell office:value-type="float" office:value="167760" table:style-name="ce131">
            <text:p>16776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Sanol Holding</text:p>
          </table:table-cell>
          <table:table-cell office:value-type="string" table:style-name="ce93">
            <text:p>Grac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40">
            <text:p>Quotations</text:p>
          </table:table-cell>
          <table:table-cell office:value-type="float" office:value="133760" table:style-name="ce129">
            <text:p>133760</text:p>
          </table:table-cell>
          <table:table-cell office:value-type="float" office:value="7320" table:style-name="ce131">
            <text:p>732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9">
            <text:p>TOTAL</text:p>
          </table:table-cell>
          <table:table-cell table:style-name="ce145"/>
          <table:table-cell table:style-name="ce141"/>
          <table:table-cell table:style-name="ce144"/>
          <table:table-cell table:style-name="ce140"/>
          <table:table-cell table:style-name="ce148"/>
          <table:table-cell office:value-type="float" office:value="1781070" table:formula="of:=SUM([.G21:.G48])" table:style-name="ce150">
            <text:p>1781070.00</text:p>
          </table:table-cell>
          <table:table-cell table:style-name="ce59"/>
          <table:table-cell table:number-columns-repeated="16376"/>
        </table:table-row>
        <table:table-row table:style-name="ro5">
          <table:table-cell table:style-name="ce151"/>
          <table:table-cell table:style-name="ce74"/>
          <table:table-cell office:value-type="string" table:style-name="ce152">
            <text:p>YOUTH</text:p>
          </table:table-cell>
          <table:table-cell table:number-columns-repeated="2" table:style-name="ce153"/>
          <table:table-cell table:style-name="ce154"/>
          <table:table-cell table:style-name="ce155"/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skytech Africa Supplies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Histopaque</text:p>
          </table:table-cell>
          <table:table-cell office:value-type="string" table:style-name="ce121">
            <text:p>Quotation</text:p>
          </table:table-cell>
          <table:table-cell office:value-type="float" office:value="133550" table:style-name="ce74">
            <text:p>133550</text:p>
          </table:table-cell>
          <table:table-cell office:value-type="float" office:value="365000" table:style-name="ce137">
            <text:p>365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Harliflax printers</text:p>
          </table:table-cell>
          <table:table-cell office:value-type="string" table:style-name="ce93">
            <text:p>Muigai Njuguna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printing directors business card</text:p>
          </table:table-cell>
          <table:table-cell office:value-type="string" table:style-name="ce121">
            <text:p>Quotation</text:p>
          </table:table-cell>
          <table:table-cell office:value-type="float" office:value="133546" table:style-name="ce128">
            <text:p>133546</text:p>
          </table:table-cell>
          <table:table-cell office:value-type="float" office:value="250000" table:style-name="ce131">
            <text:p>250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Harlifax printers &amp;General</text:p>
          </table:table-cell>
          <table:table-cell office:value-type="string" table:style-name="ce93">
            <text:p>Muigai Njuguna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Diaries</text:p>
          </table:table-cell>
          <table:table-cell office:value-type="string" table:style-name="ce156">
            <text:p>Quotation</text:p>
          </table:table-cell>
          <table:table-cell office:value-type="float" office:value="133660" table:style-name="ce128">
            <text:p>133660</text:p>
          </table:table-cell>
          <table:table-cell office:value-type="float" office:value="100500" table:style-name="ce131">
            <text:p>100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Newaki prime ltd</text:p>
          </table:table-cell>
          <table:table-cell office:value-type="string" table:style-name="ce74">
            <text:p>John Kimath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Desktop computer</text:p>
          </table:table-cell>
          <table:table-cell office:value-type="string" table:style-name="ce156">
            <text:p>Quotation</text:p>
          </table:table-cell>
          <table:table-cell office:value-type="float" office:value="133548" table:style-name="ce74">
            <text:p>133548</text:p>
          </table:table-cell>
          <table:table-cell office:value-type="float" office:value="197500" table:style-name="ce137">
            <text:p>197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Medical <text:s/>supplies</text:p>
          </table:table-cell>
          <table:table-cell office:value-type="string" table:style-name="ce156">
            <text:p>Quotation</text:p>
          </table:table-cell>
          <table:table-cell office:value-type="float" office:value="133543" table:style-name="ce74">
            <text:p>133543</text:p>
          </table:table-cell>
          <table:table-cell office:value-type="float" office:value="90360" table:style-name="ce137">
            <text:p>903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edlab scientific co.ltd</text:p>
          </table:table-cell>
          <table:table-cell office:value-type="string" table:style-name="ce74">
            <text:p>Abigail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virus transport media collection kit</text:p>
          </table:table-cell>
          <table:table-cell office:value-type="string" table:style-name="ce156">
            <text:p>Quotation</text:p>
          </table:table-cell>
          <table:table-cell office:value-type="float" office:value="133553" table:style-name="ce74">
            <text:p>133553</text:p>
          </table:table-cell>
          <table:table-cell office:value-type="float" office:value="108000" table:style-name="ce137">
            <text:p>108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sampling kit</text:p>
          </table:table-cell>
          <table:table-cell office:value-type="string" table:style-name="ce156">
            <text:p>Quotation</text:p>
          </table:table-cell>
          <table:table-cell office:value-type="float" office:value="133655" table:style-name="ce74">
            <text:p>133655</text:p>
          </table:table-cell>
          <table:table-cell office:value-type="float" office:value="36000" table:style-name="ce137">
            <text:p>36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Red Biohazard bags</text:p>
          </table:table-cell>
          <table:table-cell office:value-type="string" table:style-name="ce156">
            <text:p>Quotation</text:p>
          </table:table-cell>
          <table:table-cell office:value-type="float" office:value="133656" table:style-name="ce74">
            <text:p>133656</text:p>
          </table:table-cell>
          <table:table-cell office:value-type="float" office:value="3800" table:style-name="ce137">
            <text:p>38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kytech Africa supplies ltd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Detection Kit</text:p>
          </table:table-cell>
          <table:table-cell office:value-type="string" table:style-name="ce156">
            <text:p>Quotation</text:p>
          </table:table-cell>
          <table:table-cell office:value-type="float" office:value="133673" table:style-name="ce74">
            <text:p>133673</text:p>
          </table:table-cell>
          <table:table-cell office:value-type="float" office:value="668000" table:style-name="ce137">
            <text:p>668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edlab scientific co.ltd</text:p>
          </table:table-cell>
          <table:table-cell office:value-type="string" table:style-name="ce74">
            <text:p>Abigail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sample collection kit</text:p>
          </table:table-cell>
          <table:table-cell office:value-type="string" table:style-name="ce156">
            <text:p>Quotation</text:p>
          </table:table-cell>
          <table:table-cell office:value-type="float" office:value="133686" table:style-name="ce74">
            <text:p>133686</text:p>
          </table:table-cell>
          <table:table-cell office:value-type="float" office:value="36000" table:style-name="ce137">
            <text:p>36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8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8">
            <text:p>Surgical face masks and bio hazard bags</text:p>
          </table:table-cell>
          <table:table-cell office:value-type="string" table:style-name="ce156">
            <text:p>Quotation</text:p>
          </table:table-cell>
          <table:table-cell office:value-type="float" office:value="133783" table:style-name="ce148">
            <text:p>133783</text:p>
          </table:table-cell>
          <table:table-cell office:value-type="float" office:value="22000" table:style-name="ce157">
            <text:p>22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51" table:style-name="ce74">
            <text:p>133651</text:p>
          </table:table-cell>
          <table:table-cell office:value-type="float" office:value="38500" table:style-name="ce131">
            <text:p>38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Skytech Africa Supplies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62" table:style-name="ce74">
            <text:p>133662</text:p>
          </table:table-cell>
          <table:table-cell office:value-type="float" office:value="55500" table:style-name="ce131">
            <text:p>55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4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filter tips</text:p>
          </table:table-cell>
          <table:table-cell office:value-type="string" table:style-name="ce156">
            <text:p>Quotation</text:p>
          </table:table-cell>
          <table:table-cell office:value-type="float" office:value="133664" table:style-name="ce148">
            <text:p>133664</text:p>
          </table:table-cell>
          <table:table-cell office:value-type="float" office:value="42000" table:style-name="ce147">
            <text:p>42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84" table:style-name="ce148">
            <text:p>133684</text:p>
          </table:table-cell>
          <table:table-cell office:value-type="float" office:value="191900" table:style-name="ce147">
            <text:p>1919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4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filter tips</text:p>
          </table:table-cell>
          <table:table-cell office:value-type="string" table:style-name="ce156">
            <text:p>Quotation</text:p>
          </table:table-cell>
          <table:table-cell office:value-type="float" office:value="133752" table:style-name="ce148">
            <text:p>133752</text:p>
          </table:table-cell>
          <table:table-cell office:value-type="float" office:value="62450" table:style-name="ce147">
            <text:p>624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Riam General supplies</text:p>
          </table:table-cell>
          <table:table-cell office:value-type="string" table:style-name="ce93">
            <text:p>miriam Njambi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replacement bars for gate pillars</text:p>
          </table:table-cell>
          <table:table-cell office:value-type="string" table:style-name="ce156">
            <text:p>Quotation</text:p>
          </table:table-cell>
          <table:table-cell office:value-type="float" office:value="133762" table:style-name="ce74">
            <text:p>133762</text:p>
          </table:table-cell>
          <table:table-cell office:value-type="float" office:value="23640" table:style-name="ce131">
            <text:p>2364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Johand General Supplies</text:p>
          </table:table-cell>
          <table:table-cell office:value-type="string" table:style-name="ce93">
            <text:p>Jonathon Kilonzo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56">
            <text:p>Quotation</text:p>
          </table:table-cell>
          <table:table-cell office:value-type="float" office:value="133679" table:style-name="ce129">
            <text:p>133679</text:p>
          </table:table-cell>
          <table:table-cell office:value-type="float" office:value="73627" table:style-name="ce131">
            <text:p>73627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Johand General Supplies</text:p>
          </table:table-cell>
          <table:table-cell office:value-type="string" table:style-name="ce93">
            <text:p>Jonathon Kilonzo</text:p>
          </table:table-cell>
          <table:table-cell office:value-type="string" table:style-name="ce139">
            <text:p>Goods</text:p>
          </table:table-cell>
          <table:table-cell office:value-type="string" table:style-name="ce95">
            <text:p>hardaware consumables</text:p>
          </table:table-cell>
          <table:table-cell office:value-type="string" table:style-name="ce140">
            <text:p>Quotation</text:p>
          </table:table-cell>
          <table:table-cell office:value-type="float" office:value="133680" table:style-name="ce129">
            <text:p>133680</text:p>
          </table:table-cell>
          <table:table-cell office:value-type="float" office:value="37660" table:style-name="ce131">
            <text:p>3766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58">
            <text:p>TOTAL</text:p>
          </table:table-cell>
          <table:table-cell table:style-name="ce148"/>
          <table:table-cell table:style-name="ce139"/>
          <table:table-cell table:style-name="ce148"/>
          <table:table-cell table:style-name="ce140"/>
          <table:table-cell table:style-name="ce159"/>
          <table:table-cell office:value-type="float" office:value="2402437" table:formula="of:=SUM([.G51:.G69])" table:style-name="ce160">
            <text:p>2402437.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61">
            <text:p>TOTAL PURCHASES FOR THE 3rd <text:s/>QUARTER =55%</text:p>
          </table:table-cell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59"/>
          <table:table-cell table:number-columns-repeated="16376"/>
        </table:table-row>
        <table:table-row table:style-name="ro5">
          <table:table-cell office:value-type="string" table:style-name="ce161">
            <text:p>%= (PWD 696709+ Women 1781070 + Youth 2402437) ÷8830697×100 <text:s text:c="2"/>= 55</text:p>
          </table:table-cell>
          <table:table-cell table:style-name="ce161"/>
          <table:table-cell table:style-name="ce163"/>
          <table:table-cell table:style-name="ce168"/>
          <table:table-cell table:style-name="ce165"/>
          <table:table-cell table:style-name="ce166"/>
          <table:table-cell table:style-name="ce167"/>
          <table:table-cell table:style-name="ce59"/>
          <table:table-cell table:number-columns-repeated="16376"/>
        </table:table-row>
        <table:table-row table:style-name="ro7">
          <table:table-cell table:style-name="ce168"/>
          <table:table-cell table:style-name="ce161"/>
          <table:table-cell table:style-name="ce169"/>
          <table:table-cell table:style-name="ce161"/>
          <table:table-cell table:style-name="ce112"/>
          <table:table-cell table:style-name="ce113"/>
          <table:table-cell table:style-name="ce170"/>
          <table:table-cell table:style-name="ce59"/>
          <table:table-cell table:number-columns-repeated="16376"/>
        </table:table-row>
        <table:table-row table:style-name="ro2">
          <table:table-cell table:style-name="ce171"/>
          <table:table-cell office:value-type="string" table:style-name="ce110">
            <text:p>Section C: Summary of all contract Awards as presented in Section B above</text:p>
          </table:table-cell>
          <table:table-cell table:style-name="ce172"/>
          <table:table-cell table:number-columns-repeated="2" table:style-name="ce112"/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14">
          <table:table-cell office:value-type="string" table:style-name="ce117">
            <text:p>No.</text:p>
          </table:table-cell>
          <table:table-cell office:value-type="string" table:style-name="ce174">
            <text:p>Category</text:p>
          </table:table-cell>
          <table:table-cell office:value-type="string" table:style-name="ce118">
            <text:p>No. of Contracts awarded</text:p>
          </table:table-cell>
          <table:table-cell office:value-type="string" table:style-name="ce117">
            <text:p>Total Value of contracts awarded</text:p>
          </table:table-cell>
          <table:table-cell office:value-type="string" table:style-name="ce117">
            <text:p>% of contract value per categorty</text:p>
          </table:table-cell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7">
          <table:table-cell office:value-type="float" office:value="1" table:style-name="ce121">
            <text:p>1</text:p>
          </table:table-cell>
          <table:table-cell office:value-type="string" table:style-name="ce117">
            <text:p>PWD</text:p>
          </table:table-cell>
          <table:table-cell office:value-type="float" office:value="10" table:style-name="ce136">
            <text:p>10</text:p>
          </table:table-cell>
          <table:table-cell office:value-type="float" office:value="696709" table:style-name="ce175">
            <text:p>696709.00</text:p>
          </table:table-cell>
          <table:table-cell office:value-type="percentage" office:value="0.14000000000000001" table:style-name="ce176">
            <text:p>14%</text:p>
          </table:table-cell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7">
          <table:table-cell office:value-type="float" office:value="2" table:style-name="ce121">
            <text:p>2</text:p>
          </table:table-cell>
          <table:table-cell office:value-type="string" table:style-name="ce122">
            <text:p>Women</text:p>
          </table:table-cell>
          <table:table-cell office:value-type="float" office:value="28" table:style-name="ce136">
            <text:p>28</text:p>
          </table:table-cell>
          <table:table-cell office:value-type="float" office:value="1781070" table:style-name="ce177">
            <text:p>1,781,070.00</text:p>
          </table:table-cell>
          <table:table-cell office:value-type="percentage" office:value="0.36499999999999999" table:style-name="ce178">
            <text:p>37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office:value-type="float" office:value="3" table:style-name="ce121">
            <text:p>3</text:p>
          </table:table-cell>
          <table:table-cell office:value-type="string" table:style-name="ce122">
            <text:p>Youth</text:p>
          </table:table-cell>
          <table:table-cell office:value-type="float" office:value="19" table:style-name="ce136">
            <text:p>19</text:p>
          </table:table-cell>
          <table:table-cell office:value-type="float" office:value="2402437" table:style-name="ce177">
            <text:p>2,402,437.00</text:p>
          </table:table-cell>
          <table:table-cell office:value-type="percentage" office:value="0.49" table:style-name="ce178">
            <text:p>49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table:style-name="ce121"/>
          <table:table-cell office:value-type="string" table:style-name="ce122">
            <text:p>Total</text:p>
          </table:table-cell>
          <table:table-cell office:value-type="float" office:value="57" table:formula="of:=SUM([.C76:.C78])" table:style-name="ce180">
            <text:p>57</text:p>
          </table:table-cell>
          <table:table-cell office:value-type="float" office:value="4880216" table:formula="of:=SUM([.D76:.D78])" table:style-name="ce181">
            <text:p>4,880,216.00</text:p>
          </table:table-cell>
          <table:table-cell office:value-type="percentage" office:value="1" table:style-name="ce178">
            <text:p>100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office:value-type="string" table:style-name="ce59">
            <text:p>PREPARED BY…………………………………………….SIGNATURE……………………………………………….</text:p>
          </table:table-cell>
          <table:table-cell table:number-columns-repeated="2" table:style-name="ce59"/>
          <table:table-cell office:value-type="string" table:style-name="ce59">
            <text:p>DATE…………………………………………………..</text:p>
          </table:table-cell>
          <table:table-cell table:number-columns-repeated="4" table:style-name="ce59"/>
          <table:table-cell table:number-columns-repeated="16376"/>
        </table:table-row>
        <table:table-row table:number-rows-repeated="2"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office:value-type="string" table:style-name="ce59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7" table:style-name="ce59"/>
          <table:table-cell table:number-columns-repeated="16376"/>
        </table:table-row>
        <table:table-row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table:style-name="ce1"/>
          <table:table-cell table:style-name="ce59"/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82"/>
          <table:table-cell table:style-name="ce183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style-name="ce182"/>
          <table:table-cell table:number-columns-repeated="16377" table:style-name="ce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day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$</number:text>
      <number:number number:decimal-places="2" number:min-integer-digits="1" number:grouping="true"/>
    </number:number-style>
    <number:number-style style:name="N40">
      <style:text-properties fo:color="#FF0000"/>
      <number:text>-$</number:text>
      <number:number number:decimal-places="2" number:min-integer-digits="1" number:grouping="true"/>
      <style:map style:condition="value()&gt;=0" style:apply-style-name="N40P0"/>
    </number:number-style>
    <style:style style:name="Comma" style:family="table-cell" style:data-style-name="N36"/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83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ocurement PC 1</meta:initial-creator>
    <dc:creator>Moonlash</dc:creator>
    <meta:creation-date>2022-01-10T06:28:57Z</meta:creation-date>
    <dc:date>2024-05-04T10:09:27Z</dc:date>
    <meta:print-date>2022-04-07T07:47:33Z</meta:print-date>
  </office:meta>
</office:document-meta>
</file>