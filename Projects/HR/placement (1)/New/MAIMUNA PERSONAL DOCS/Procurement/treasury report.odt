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List_20_Paragraph">
      <style:text-properties fo:font-weight="bold" style:font-weight-asian="bold" style:font-weight-complex="bold"/>
    </style:style>
    <style:style style:name="P5" style:family="paragraph" style:parent-style-name="List_20_Paragraph">
      <style:paragraph-properties fo:margin-left="0in" fo:margin-right="0in" fo:text-indent="0in" style:auto-text-indent="false"/>
    </style:style>
    <style:style style:name="P6" style:family="paragraph" style:parent-style-name="List_20_Paragraph" style:list-style-name="WWNum1"/>
    <style:style style:name="P7" style:family="paragraph" style:parent-style-name="List_20_Paragraph" style:list-style-name="WWNum2"/>
    <style:style style:name="P8" style:family="paragraph" style:parent-style-name="List_20_Paragraph" style:list-style-name="WWNum3"/>
    <style:style style:name="P9" style:family="paragraph" style:parent-style-name="Standard" style:master-page-name="Standard">
      <style:paragraph-properties style:page-number="auto"/>
      <style:text-properties fo:font-weight="bold" style:font-weight-asian="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LPHA ROYAL WOMEN GROUP</text:p>
      <text:p text:style-name="Standard"/>
      <text:p text:style-name="Standard">I would like to thank God for enabling us to meet <text:s/>when We are all safe and <text:bookmark text:name="Bookmark"/>sound <text:s/>and keep praying for the mercy upon us all.</text:p>
      <text:p text:style-name="Standard"><text:s/>I would like to inform you that our chama <text:s/>financial position is good. The following is our financial statement as at 30.09.2022</text:p>
      <text:list xml:id="list7242266346429340757" text:style-name="WWNum1">
        <text:list-item>
          <text:p text:style-name="P6">Shares contribution <text:s/>todate<text:tab/><text:tab/><text:tab/><text:tab/><text:tab/> 3,250,000.00</text:p>
        </text:list-item>
        <text:list-item>
          <text:p text:style-name="P6">CSR <text:s/>Welfare<text:tab/><text:tab/><text:tab/><text:tab/><text:tab/><text:tab/><text:tab/> <text:s text:c="3"/>357,500.00</text:p>
        </text:list-item>
        <text:list-item>
          <text:p text:style-name="P6">Commission earned during the period since inception <text:s text:c="23"/>154,000.00</text:p>
        </text:list-item>
        <text:list-item>
          <text:p text:style-name="P6">Loans issued since inception<text:tab/><text:tab/><text:tab/><text:tab/><text:tab/> 1,590,000.00</text:p>
        </text:list-item>
      </text:list>
      <text:p text:style-name="P5"><text:s/>NOTE. The commission from loan is 10 percent of the loan issued.hence from 1,590,000.00 the commission was suppose to be 159,000.it was noted that Aisha muthonis loan of ksh.100,000 was paid at 5 percent and paid commission of kshs 5,000 instead of 10,000</text:p>
      <text:p text:style-name="Standard"/>
      <text:p text:style-name="P3">INVESTMENTS</text:p>
      <text:p text:style-name="Standard">The welfare <text:s/>managed to invest some funds in various financial institution as follow</text:p>
      <text:p text:style-name="List_20_Paragraph">Name <text:s text:c="9"/>Invested <text:s text:c="14"/>Interest earned</text:p>
      <text:list xml:id="list5122202319232055885" text:style-name="WWNum2">
        <text:list-item>
          <text:p text:style-name="P7">ICEA <text:s text:c="12"/>500,000<text:tab/> <text:s text:c="6"/><text:tab/> <text:s text:c="7"/>127436<text:tab/></text:p>
        </text:list-item>
        <text:list-item>
          <text:p text:style-name="P7">Zimelee<text:tab/> <text:s text:c="6"/>500,000<text:tab/><text:tab/> <text:s text:c="8"/>87493</text:p>
        </text:list-item>
        <text:list-item>
          <text:p text:style-name="P7">commision from loans <text:s text:c="26"/>154,000.00</text:p>
        </text:list-item>
      </text:list>
      <text:p text:style-name="List_20_Paragraph">TOTAL PROFIT OF THE WELFARE <text:s text:c="9"/><text:span text:style-name="T1"><text:s/>368,929</text:span></text:p>
      <text:p text:style-name="P3">HOUSE PROJECT</text:p>
      <text:p text:style-name="Standard">The <text:s/>Chama invested in Buxton housing project with kshs 3,600,000</text:p>
      <text:p text:style-name="Standard">Out of this 3.6m <text:s/>we incurred some expense’s such as :- <text:s text:c="4"/></text:p>
      <text:list xml:id="list5323696350021953470" text:style-name="WWNum3">
        <text:list-item>
          <text:p text:style-name="P8">Legal fee<text:tab/><text:tab/><text:tab/><text:tab/>83,520</text:p>
        </text:list-item>
        <text:list-item>
          <text:p text:style-name="P8">Certification on offer letter<text:tab/><text:tab/> <text:s/>1,500</text:p>
        </text:list-item>
        <text:list-item>
          <text:p text:style-name="P8">Signing of sale agreement<text:tab/> <text:tab/> <text:s/>3,000<text:tab/></text:p>
        </text:list-item>
      </text:list>
      <text:p text:style-name="P4">TOTAL EXPENDITURE ON THE HOUSING BY SEPTEMBER 2020 WAS KSHS 3,688,020</text:p>
      <text:p text:style-name="P4"/>
      <text:p text:style-name="P4"/>
      <text:p text:style-name="P4"><text:soft-page-break/></text:p>
      <text:p text:style-name="P4">Debtors</text:p>
      <text:p text:style-name="Standard">Debtors who had not paid by the end of the financial that is 30.09.---- they appear as debtors since books are closed after that date.</text:p>
      <text:p text:style-name="Standard">The outstanding total amount unpaid <text:s/>by 30<text:span text:style-name="T2">th</text:span> September 2022 was 121,500.</text:p>
      <text:p text:style-name="Standard">members did honor their promises and the outstanding amount have been cleared by some members .</text:p>
      <text:p text:style-name="Standard">A total of 59,500 has been cleared and only a <text:s/>balance of kshs 62000 is still pending.</text:p>
      <text:p text:style-name="Standard"><text:s text:c="13"/><text:span text:style-name="T1"><text:s/>CREDITORS</text:span></text:p>
      <text:p text:style-name="Standard"><text:span text:style-name="T1">T</text:span><text:span text:style-name="T3">here was a total of three members who resigned from the welfare by last year October 2021.</text:span></text:p>
      <text:p text:style-name="P1">The total due amount for the three members was kshs 765,000</text:p>
      <text:p text:style-name="P1">by October 2022 we managed to clear one member by kshs 200,500.The amount was less the 5 administrative cost and CSR That she owned the chama.</text:p>
      <text:p text:style-name="P2"><text:s text:c="5"/>LOAN BALANCE.</text:p>
      <text:p text:style-name="P1">By the end of the financial year,there was a total of kshs 220,000 loan outstanding.</text:p>
      <text:p text:style-name="P1">The amount was of kshs 150,000 was cleared by October and the loan balance outstanding to date is ksh70,000.</text:p>
      <text:p text:style-name="P1"><text:s text:c="10"/><text:span text:style-name="T1"><text:s text:c="4"/>BUXTON POINT PROJECT.</text:span></text:p>
      <text:p text:style-name="P1"><text:span text:style-name="T1">T</text:span>he housing project has been reported to have been at 75 percent to completion by October 2022,Attached is the report from our investment manager in charge of our unit.</text:p>
      <text:p text:style-name="P1">We have completed the payment of the house and receipt of the same is attached.</text:p>
      <text:p text:style-name="P1"/>
      <text:p text:style-name="Standard">We would like to advise members that they should pay or make standing orders <text:s/>through paybill <text:s/>522522 <text:s/>followed by account no.121028407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warabu</meta:initial-creator>
    <dc:creator>Abdalla Said Abdalla</dc:creator>
    <meta:editing-cycles>4</meta:editing-cycles>
    <meta:creation-date>2022-10-24T10:53:00</meta:creation-date>
    <dc:date>2022-10-28T10:49:31.71</dc:date>
    <meta:editing-duration>PT1M4S</meta:editing-duration>
    <meta:generator>OpenOffice/4.1.9$Win32 OpenOffice.org_project/419m1$Build-9805</meta:generator>
    <meta:document-statistic meta:table-count="0" meta:image-count="0" meta:object-count="0" meta:page-count="2" meta:paragraph-count="38" meta:word-count="436" meta:character-count="27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